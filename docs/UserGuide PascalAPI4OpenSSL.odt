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MT" svg:font-family="'Arial MT'" style:font-family-generic="swiss"/>
    <style:font-face style:name="CG Times" svg:font-family="'CG Times'" style:font-family-generic="roman" style:font-pitch="variable"/>
    <style:font-face style:name="Courier" svg:font-family="Courier, 'Courier New'" style:font-family-generic="modern"/>
    <style:font-face style:name="Courier New" svg:font-family="'Courier New'" style:font-family-generic="modern"/>
    <style:font-face style:name="Courier New1" svg:font-family="'Courier New'" style:font-adornments="Regular" style:font-family-generic="modern" style:font-pitch="fixed"/>
    <style:font-face style:name="DejaVu Sans" svg:font-family="'DejaVu Sans'" style:font-family-generic="system" style:font-pitch="variable"/>
    <style:font-face style:name="Helv" svg:font-family="Helv, Arial" style:font-family-generic="swiss" style:font-pitch="variable"/>
    <style:font-face style:name="Helvetica" svg:font-family="Helvetica"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OpenSymbol" svg:font-family="OpenSymbol" style:font-charset="x-symbol"/>
    <style:font-face style:name="Palatino" svg:font-family="Palatino" style:font-family-generic="roman" style:font-pitch="variable"/>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NewRomanPS" svg:font-family="TimesNewRomanPS" style:font-family-generic="roman"/>
  </office:font-face-decls>
  <office:automatic-styles>
    <style:style style:name="Table2" style:family="table">
      <style:table-properties style:width="6.6951in" table:align="margins" style:writing-mode="lr-tb"/>
    </style:style>
    <style:style style:name="Table2.A" style:family="table-column">
      <style:table-column-properties style:column-width="2.5639in" style:rel-column-width="25096*"/>
    </style:style>
    <style:style style:name="Table2.B" style:family="table-column">
      <style:table-column-properties style:column-width="4.1313in" style:rel-column-width="40439*"/>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4" style:family="table">
      <style:table-properties style:width="6.6951in" table:align="margins" style:may-break-between-rows="true" style:writing-mode="lr-tb"/>
    </style:style>
    <style:style style:name="Table4.A" style:family="table-column">
      <style:table-column-properties style:column-width="3.1889in" style:rel-column-width="31214*"/>
    </style:style>
    <style:style style:name="Table4.B" style:family="table-column">
      <style:table-column-properties style:column-width="3.5063in" style:rel-column-width="34321*"/>
    </style:style>
    <style:style style:name="Table4.1" style:family="table-row">
      <style:table-row-properties fo:keep-together="always"/>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1.8507in" style:rel-column-width="18115*"/>
    </style:style>
    <style:style style:name="Table1.B" style:family="table-column">
      <style:table-column-properties style:column-width="4.8444in" style:rel-column-width="47420*"/>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2" style:family="table-row">
      <style:table-row-properties style:min-row-height="0.3903in"/>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A5" style:family="table-cell">
      <style:table-cell-properties style:vertical-align="middle" fo:padding="0.0382in" fo:border-left="0.5pt solid #000000" fo:border-right="none" fo:border-top="none" fo:border-bottom="0.5pt solid #000000"/>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4" style:family="paragraph" style:parent-style-name="Standard">
      <style:paragraph-properties fo:margin-top="0in" fo:margin-bottom="0in" style:contextual-spacing="false" fo:text-align="start" style:justify-single-word="false"/>
      <style:text-properties style:font-name="Helv"/>
    </style:style>
    <style:style style:name="P5"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6"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7" style:family="paragraph" style:parent-style-name="Running_20_Footer">
      <style:paragraph-properties fo:margin-top="0in" fo:margin-bottom="0in" style:contextual-spacing="false" fo:padding="0in" fo:border="none"/>
      <style:text-properties style:font-name="Arial"/>
    </style:style>
    <style:style style:name="P8"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P9"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10"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style:style>
    <style:style style:name="P1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16ca1d"/>
    </style:style>
    <style:style style:name="P12"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ebd59d"/>
    </style:style>
    <style:style style:name="P13"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rsid="0175dd25" officeooo:paragraph-rsid="00ebd59d"/>
    </style:style>
    <style:style style:name="P14"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style:style>
    <style:style style:name="P15"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16"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1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18" style:family="paragraph" style:parent-style-name="Running_20_Footer">
      <style:paragraph-properties fo:margin-top="0in" fo:margin-bottom="0in" style:contextual-spacing="false" fo:line-height="100%" fo:padding="0in" fo:border="none">
        <style:tab-stops/>
      </style:paragraph-properties>
    </style:style>
    <style:style style:name="P19"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20"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21"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22"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23"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24" style:family="paragraph" style:parent-style-name="Header" style:master-page-name="">
      <style:paragraph-properties style:page-number="auto">
        <style:tab-stops>
          <style:tab-stop style:position="3in" style:type="center"/>
          <style:tab-stop style:position="6.622in" style:type="right"/>
        </style:tab-stops>
      </style:paragraph-properties>
      <style:text-properties officeooo:paragraph-rsid="002cd7d3"/>
    </style:style>
    <style:style style:name="P25" style:family="paragraph" style:parent-style-name="Footer">
      <style:paragraph-properties fo:text-align="end" style:justify-single-word="false"/>
      <style:text-properties officeooo:paragraph-rsid="002cd7d3"/>
    </style:style>
    <style:style style:name="P26" style:family="paragraph" style:parent-style-name="Footer">
      <style:paragraph-properties fo:text-align="end" style:justify-single-word="false"/>
    </style:style>
    <style:style style:name="P27" style:family="paragraph" style:parent-style-name="Header">
      <style:paragraph-properties fo:text-align="end" style:justify-single-word="false"/>
    </style:style>
    <style:style style:name="P28"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9" style:family="paragraph" style:parent-style-name="Footer">
      <style:paragraph-properties fo:text-align="start" style:justify-single-word="false"/>
    </style:style>
    <style:style style:name="P30"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31" style:family="paragraph" style:parent-style-name="Standard">
      <style:paragraph-properties fo:margin-top="0in" fo:margin-bottom="0in" style:contextual-spacing="false"/>
    </style:style>
    <style:style style:name="P32"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3"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loext:opacity="100%" style:font-name="Liberation Sans" fo:font-size="32pt" fo:font-style="italic" fo:font-weight="bold" officeooo:rsid="00b86ec0" officeooo:paragraph-rsid="00b86ec0" style:font-size-asian="32pt" style:font-style-asian="italic" style:font-weight-asian="bold" style:font-size-complex="32pt" style:font-style-complex="italic"/>
    </style:style>
    <style:style style:name="P34" style:family="paragraph" style:parent-style-name="Standard">
      <style:text-properties fo:font-style="italic" officeooo:rsid="013c044e" officeooo:paragraph-rsid="013c044e" style:font-style-asian="italic" style:font-style-complex="italic"/>
    </style:style>
    <style:style style:name="P35" style:family="paragraph" style:parent-style-name="Standard">
      <style:text-properties fo:font-style="italic" officeooo:rsid="0148d736" officeooo:paragraph-rsid="0148d736" style:font-style-asian="italic" style:font-style-complex="italic"/>
    </style:style>
    <style:style style:name="P36" style:family="paragraph" style:parent-style-name="Table_20_Contents">
      <style:text-properties fo:font-style="italic" officeooo:rsid="014df08c" officeooo:paragraph-rsid="014df08c" style:font-style-asian="italic" style:font-style-complex="italic"/>
    </style:style>
    <style:style style:name="P37" style:family="paragraph" style:parent-style-name="Text_20_body">
      <style:text-properties fo:font-style="italic" officeooo:rsid="013efa9e" officeooo:paragraph-rsid="0148d2a8" style:font-style-asian="italic" style:font-style-complex="italic"/>
    </style:style>
    <style:style style:name="P38" style:family="paragraph" style:parent-style-name="Text_20_body">
      <style:text-properties fo:font-style="italic" officeooo:rsid="01240032" officeooo:paragraph-rsid="0148d2a8" style:font-style-asian="italic" style:font-style-complex="italic"/>
    </style:style>
    <style:style style:name="P39" style:family="paragraph" style:parent-style-name="Standard">
      <style:text-properties fo:font-style="italic" officeooo:rsid="014ceb1c" officeooo:paragraph-rsid="014ceb1c" style:font-style-asian="italic" style:font-style-complex="italic"/>
    </style:style>
    <style:style style:name="P40" style:family="paragraph" style:parent-style-name="Standard">
      <style:text-properties fo:font-style="italic" officeooo:rsid="014cd31b" officeooo:paragraph-rsid="014cd31b" style:font-style-asian="italic" style:font-style-complex="italic"/>
    </style:style>
    <style:style style:name="P41" style:family="paragraph" style:parent-style-name="Table_20_Contents">
      <style:text-properties fo:font-style="italic" officeooo:rsid="0144fdd7" officeooo:paragraph-rsid="0148d2a8" style:font-style-asian="italic" style:font-style-complex="italic"/>
    </style:style>
    <style:style style:name="P42" style:family="paragraph" style:parent-style-name="Table_20_Contents">
      <style:text-properties fo:font-style="italic" officeooo:rsid="01561d83" officeooo:paragraph-rsid="01561d83" style:font-style-asian="italic" style:font-style-complex="italic"/>
    </style:style>
    <style:style style:name="P43" style:family="paragraph" style:parent-style-name="Text_20_body">
      <style:text-properties fo:font-style="italic" officeooo:rsid="01561d83" officeooo:paragraph-rsid="01561d83" style:font-style-asian="italic" style:font-style-complex="italic"/>
    </style:style>
    <style:style style:name="P44" style:family="paragraph" style:parent-style-name="Table_20_Contents">
      <style:text-properties fo:font-style="italic" officeooo:rsid="01563aa2" officeooo:paragraph-rsid="01563aa2" style:font-style-asian="italic" style:font-style-complex="italic"/>
    </style:style>
    <style:style style:name="P45" style:family="paragraph" style:parent-style-name="Text_20_body">
      <style:text-properties fo:font-style="italic" officeooo:rsid="0148d2a8" officeooo:paragraph-rsid="01552bae" style:font-style-asian="italic" style:font-style-complex="italic"/>
    </style:style>
    <style:style style:name="P46" style:family="paragraph" style:parent-style-name="Text_20_body">
      <style:text-properties fo:font-style="italic" officeooo:rsid="01552bae" officeooo:paragraph-rsid="01552bae" style:font-style-asian="italic" style:font-style-complex="italic"/>
    </style:style>
    <style:style style:name="P47" style:family="paragraph" style:parent-style-name="Standard">
      <style:text-properties fo:font-style="italic" officeooo:rsid="015bafb3" officeooo:paragraph-rsid="015bafb3" style:font-style-asian="italic" style:font-style-complex="italic"/>
    </style:style>
    <style:style style:name="P48" style:family="paragraph" style:parent-style-name="Standard">
      <style:text-properties fo:font-style="italic" officeooo:rsid="01647472" officeooo:paragraph-rsid="01647472" style:font-style-asian="italic" style:font-style-complex="italic"/>
    </style:style>
    <style:style style:name="P49" style:family="paragraph" style:parent-style-name="Standard">
      <style:text-properties officeooo:paragraph-rsid="013c044e"/>
    </style:style>
    <style:style style:name="P50" style:family="paragraph" style:parent-style-name="Standard">
      <style:paragraph-properties fo:margin-left="0.5in" fo:margin-right="0in" fo:text-indent="0in" style:auto-text-indent="false"/>
      <style:text-properties officeooo:rsid="011573e0" officeooo:paragraph-rsid="011573e0"/>
    </style:style>
    <style:style style:name="P51" style:family="paragraph" style:parent-style-name="Pascal">
      <style:text-properties fo:font-style="normal" officeooo:rsid="0138335b" officeooo:paragraph-rsid="0148d2a8" style:font-style-asian="normal" style:font-style-complex="normal"/>
    </style:style>
    <style:style style:name="P52" style:family="paragraph" style:parent-style-name="Standard">
      <style:text-properties fo:font-style="normal" officeooo:rsid="0148d736" officeooo:paragraph-rsid="0148d736" style:font-style-asian="normal" style:font-style-complex="normal"/>
    </style:style>
    <style:style style:name="P53" style:family="paragraph" style:parent-style-name="Text_20_body">
      <style:text-properties fo:font-style="normal" officeooo:rsid="0148d2a8" officeooo:paragraph-rsid="01552bae" style:font-style-asian="normal" style:font-style-complex="normal"/>
    </style:style>
    <style:style style:name="P54" style:family="paragraph" style:parent-style-name="Text_20_body">
      <style:text-properties fo:font-style="normal" officeooo:rsid="01387918" officeooo:paragraph-rsid="01387918" style:font-style-asian="normal" style:font-style-complex="normal"/>
    </style:style>
    <style:style style:name="P55" style:family="paragraph" style:parent-style-name="Text_20_body">
      <style:text-properties officeooo:paragraph-rsid="01387918"/>
    </style:style>
    <style:style style:name="P56" style:family="paragraph" style:parent-style-name="Standard">
      <style:text-properties officeooo:rsid="010c2cf8" officeooo:paragraph-rsid="010c2cf8"/>
    </style:style>
    <style:style style:name="P57" style:family="paragraph" style:parent-style-name="Standard">
      <style:text-properties officeooo:rsid="010c2cf8" officeooo:paragraph-rsid="010e0973"/>
    </style:style>
    <style:style style:name="P58" style:family="paragraph" style:parent-style-name="Standard">
      <style:text-properties officeooo:rsid="010c2cf8" officeooo:paragraph-rsid="010fa229"/>
    </style:style>
    <style:style style:name="P59" style:family="paragraph" style:parent-style-name="Standard">
      <style:text-properties officeooo:paragraph-rsid="010c2cf8"/>
    </style:style>
    <style:style style:name="P60" style:family="paragraph" style:parent-style-name="Standard">
      <style:text-properties officeooo:paragraph-rsid="0110b519"/>
    </style:style>
    <style:style style:name="P61" style:family="paragraph" style:parent-style-name="Standard">
      <style:text-properties officeooo:rsid="0115cee3" officeooo:paragraph-rsid="0115cee3"/>
    </style:style>
    <style:style style:name="P62" style:family="paragraph" style:parent-style-name="Standard">
      <style:text-properties officeooo:paragraph-rsid="0110b28a"/>
    </style:style>
    <style:style style:name="P63" style:family="paragraph" style:parent-style-name="Standard">
      <style:text-properties officeooo:rsid="010fa229" officeooo:paragraph-rsid="010fa229"/>
    </style:style>
    <style:style style:name="P64" style:family="paragraph" style:parent-style-name="Pascal">
      <style:text-properties officeooo:paragraph-rsid="0148d2a8"/>
    </style:style>
    <style:style style:name="P65" style:family="paragraph" style:parent-style-name="Pascal">
      <style:paragraph-properties fo:margin-left="0in" fo:margin-right="0in" fo:text-indent="0in" style:auto-text-indent="false"/>
      <style:text-properties officeooo:paragraph-rsid="0148d2a8"/>
    </style:style>
    <style:style style:name="P66" style:family="paragraph" style:parent-style-name="Pascal">
      <style:paragraph-properties fo:margin-left="0in" fo:margin-right="0in" fo:text-indent="0in" style:auto-text-indent="false" fo:keep-with-next="auto"/>
      <style:text-properties officeooo:paragraph-rsid="0148d2a8"/>
    </style:style>
    <style:style style:name="P67" style:family="paragraph" style:parent-style-name="Pascal" style:master-page-name="">
      <style:paragraph-properties style:page-number="auto" fo:keep-with-next="auto"/>
      <style:text-properties officeooo:paragraph-rsid="0148d2a8"/>
    </style:style>
    <style:style style:name="P68" style:family="paragraph" style:parent-style-name="Pascal">
      <style:paragraph-properties fo:keep-with-next="auto"/>
      <style:text-properties officeooo:paragraph-rsid="0148d2a8"/>
    </style:style>
    <style:style style:name="P69" style:family="paragraph" style:parent-style-name="Standard">
      <style:text-properties officeooo:paragraph-rsid="0148d2a8"/>
    </style:style>
    <style:style style:name="P70" style:family="paragraph" style:parent-style-name="Table_20_Contents">
      <style:text-properties officeooo:paragraph-rsid="0148d2a8"/>
    </style:style>
    <style:style style:name="P71" style:family="paragraph" style:parent-style-name="Text_20_body">
      <style:text-properties officeooo:paragraph-rsid="0148d2a8"/>
    </style:style>
    <style:style style:name="P72" style:family="paragraph" style:parent-style-name="Standard">
      <style:text-properties officeooo:rsid="0148d736" officeooo:paragraph-rsid="0148d736"/>
    </style:style>
    <style:style style:name="P73" style:family="paragraph" style:parent-style-name="Standard">
      <style:text-properties officeooo:paragraph-rsid="0115cee3"/>
    </style:style>
    <style:style style:name="P74" style:family="paragraph" style:parent-style-name="Standard">
      <style:text-properties officeooo:rsid="0152e795" officeooo:paragraph-rsid="0152e795"/>
    </style:style>
    <style:style style:name="P75" style:family="paragraph" style:parent-style-name="Text_20_body">
      <style:text-properties officeooo:rsid="0152e795" officeooo:paragraph-rsid="0152e795"/>
    </style:style>
    <style:style style:name="P76" style:family="paragraph" style:parent-style-name="Standard">
      <style:text-properties officeooo:rsid="014a7481" officeooo:paragraph-rsid="014a7481"/>
    </style:style>
    <style:style style:name="P77" style:family="paragraph" style:parent-style-name="Standard">
      <style:text-properties officeooo:rsid="0149dee9" officeooo:paragraph-rsid="0149dee9"/>
    </style:style>
    <style:style style:name="P78" style:family="paragraph" style:parent-style-name="Pascal">
      <style:text-properties officeooo:rsid="0130fe9e" officeooo:paragraph-rsid="0148d2a8"/>
    </style:style>
    <style:style style:name="P79" style:family="paragraph" style:parent-style-name="Standard">
      <style:text-properties officeooo:rsid="0130fe9e" officeooo:paragraph-rsid="0148d2a8"/>
    </style:style>
    <style:style style:name="P80" style:family="paragraph" style:parent-style-name="Standard">
      <style:text-properties officeooo:rsid="0126c75f" officeooo:paragraph-rsid="0148d2a8"/>
    </style:style>
    <style:style style:name="P81" style:family="paragraph" style:parent-style-name="Standard">
      <style:text-properties officeooo:rsid="012c4d21" officeooo:paragraph-rsid="0148d2a8"/>
    </style:style>
    <style:style style:name="P82" style:family="paragraph" style:parent-style-name="Standard">
      <style:text-properties officeooo:rsid="01272b45" officeooo:paragraph-rsid="0148d2a8"/>
    </style:style>
    <style:style style:name="P83" style:family="paragraph" style:parent-style-name="Standard">
      <style:text-properties style:use-window-font-color="true" loext:opacity="0%" style:font-name="Liberation Sans2" fo:font-size="11pt" fo:language="en" fo:country="GB" officeooo:rsid="0130fe9e" officeooo:paragraph-rsid="0148d2a8" style:font-name-asian="Times New Roman" style:font-size-asian="11pt" style:font-name-complex="CG Times" style:font-size-complex="10pt" style:language-complex="ar" style:country-complex="SA"/>
    </style:style>
    <style:style style:name="P84" style:family="paragraph" style:parent-style-name="Standard">
      <style:text-properties style:use-window-font-color="true" loext:opacity="0%" style:font-name="Liberation Sans2" fo:font-size="11pt" fo:language="en" fo:country="GB" officeooo:rsid="0128e0a4" officeooo:paragraph-rsid="0148d2a8" style:font-name-asian="Times New Roman" style:font-size-asian="11pt" style:font-name-complex="CG Times" style:font-size-complex="10pt" style:language-complex="ar" style:country-complex="SA"/>
    </style:style>
    <style:style style:name="P85" style:family="paragraph" style:parent-style-name="Standard">
      <style:text-properties style:use-window-font-color="true" loext:opacity="0%" style:font-name="Liberation Sans2" fo:font-size="11pt" fo:language="en" fo:country="GB" fo:font-style="italic" officeooo:rsid="0169d5f9" officeooo:paragraph-rsid="0169d5f9" style:font-name-asian="Times New Roman" style:font-size-asian="11pt" style:font-style-asian="italic" style:font-name-complex="CG Times" style:font-size-complex="10pt" style:language-complex="ar" style:country-complex="SA" style:font-style-complex="italic"/>
    </style:style>
    <style:style style:name="P86" style:family="paragraph" style:parent-style-name="Standard">
      <style:text-properties officeooo:rsid="012ab6b9" officeooo:paragraph-rsid="0148d2a8"/>
    </style:style>
    <style:style style:name="P87" style:family="paragraph" style:parent-style-name="Standard">
      <style:text-properties officeooo:rsid="0126363e" officeooo:paragraph-rsid="0148d2a8"/>
    </style:style>
    <style:style style:name="P88" style:family="paragraph" style:parent-style-name="Standard">
      <style:text-properties officeooo:rsid="01496b74" officeooo:paragraph-rsid="01496b74"/>
    </style:style>
    <style:style style:name="P89" style:family="paragraph" style:parent-style-name="Text_20_body">
      <style:text-properties officeooo:rsid="01496b74" officeooo:paragraph-rsid="01496b74"/>
    </style:style>
    <style:style style:name="P90" style:family="paragraph" style:parent-style-name="Standard">
      <style:text-properties officeooo:rsid="014b00e4" officeooo:paragraph-rsid="014b00e4"/>
    </style:style>
    <style:style style:name="P91" style:family="paragraph" style:parent-style-name="Standard">
      <style:text-properties officeooo:paragraph-rsid="014b00e4"/>
    </style:style>
    <style:style style:name="P92" style:family="paragraph" style:parent-style-name="Standard">
      <style:text-properties officeooo:rsid="01511067" officeooo:paragraph-rsid="01511067"/>
    </style:style>
    <style:style style:name="P93" style:family="paragraph" style:parent-style-name="Table_20_Contents">
      <style:text-properties officeooo:rsid="01511067" officeooo:paragraph-rsid="01511067"/>
    </style:style>
    <style:style style:name="P94" style:family="paragraph" style:parent-style-name="Table_20_Contents">
      <style:paragraph-properties fo:keep-with-next="auto"/>
      <style:text-properties officeooo:rsid="01369f8c" officeooo:paragraph-rsid="0148d2a8"/>
    </style:style>
    <style:style style:name="P95" style:family="paragraph" style:parent-style-name="Table_20_Contents">
      <style:paragraph-properties fo:keep-with-next="auto"/>
      <style:text-properties officeooo:rsid="012dd8e3" officeooo:paragraph-rsid="0148d2a8"/>
    </style:style>
    <style:style style:name="P96" style:family="paragraph" style:parent-style-name="Table_20_Contents">
      <style:paragraph-properties fo:keep-with-next="auto"/>
      <style:text-properties officeooo:rsid="012f0885" officeooo:paragraph-rsid="0148d2a8"/>
    </style:style>
    <style:style style:name="P97" style:family="paragraph" style:parent-style-name="Text_20_body">
      <style:text-properties officeooo:rsid="012f0885" officeooo:paragraph-rsid="0148d2a8"/>
    </style:style>
    <style:style style:name="P98" style:family="paragraph" style:parent-style-name="Table_20_Contents">
      <style:paragraph-properties fo:keep-with-next="auto"/>
      <style:text-properties officeooo:rsid="01455de7" officeooo:paragraph-rsid="0148d2a8"/>
    </style:style>
    <style:style style:name="P99" style:family="paragraph" style:parent-style-name="Table_20_Contents">
      <style:text-properties officeooo:rsid="01337abe" officeooo:paragraph-rsid="0148d2a8"/>
    </style:style>
    <style:style style:name="P100" style:family="paragraph" style:parent-style-name="Table_20_Contents">
      <style:text-properties officeooo:rsid="01450e32" officeooo:paragraph-rsid="0148d2a8"/>
    </style:style>
    <style:style style:name="P101" style:family="paragraph" style:parent-style-name="Table_20_Contents">
      <style:text-properties officeooo:rsid="0144fdd7" officeooo:paragraph-rsid="0148d2a8"/>
    </style:style>
    <style:style style:name="P102" style:family="paragraph" style:parent-style-name="Table_20_Contents">
      <style:text-properties officeooo:rsid="01349ba9" officeooo:paragraph-rsid="0148d2a8"/>
    </style:style>
    <style:style style:name="P103" style:family="paragraph" style:parent-style-name="Table_20_Contents">
      <style:text-properties officeooo:rsid="0135980e" officeooo:paragraph-rsid="0148d2a8"/>
    </style:style>
    <style:style style:name="P104" style:family="paragraph" style:parent-style-name="Text_20_body">
      <style:text-properties officeooo:rsid="0123c8f8" officeooo:paragraph-rsid="0148d2a8"/>
    </style:style>
    <style:style style:name="P105" style:family="paragraph" style:parent-style-name="Text_20_body">
      <style:text-properties officeooo:rsid="0123c8f8" officeooo:paragraph-rsid="01561d83"/>
    </style:style>
    <style:style style:name="P106" style:family="paragraph" style:parent-style-name="Text_20_body">
      <style:text-properties officeooo:rsid="01469efe" officeooo:paragraph-rsid="01469efe"/>
    </style:style>
    <style:style style:name="P107" style:family="paragraph" style:parent-style-name="Text_20_body">
      <style:text-properties officeooo:rsid="01454ad6" officeooo:paragraph-rsid="0148d2a8"/>
    </style:style>
    <style:style style:name="P108" style:family="paragraph" style:parent-style-name="Text_20_body">
      <style:text-properties officeooo:paragraph-rsid="01499d73"/>
    </style:style>
    <style:style style:name="P109" style:family="paragraph" style:parent-style-name="Appendix">
      <style:text-properties officeooo:rsid="0153d3a0" officeooo:paragraph-rsid="0153d3a0"/>
    </style:style>
    <style:style style:name="P110" style:family="paragraph" style:parent-style-name="Text_20_body">
      <style:text-properties officeooo:rsid="0153d3a0" officeooo:paragraph-rsid="0153d3a0"/>
    </style:style>
    <style:style style:name="P111" style:family="paragraph" style:parent-style-name="Pascal" style:master-page-name="">
      <style:paragraph-properties style:page-number="auto" fo:keep-with-next="auto"/>
    </style:style>
    <style:style style:name="P112" style:family="paragraph" style:parent-style-name="Pascal">
      <style:paragraph-properties fo:keep-with-next="auto"/>
    </style:style>
    <style:style style:name="P113" style:family="paragraph" style:parent-style-name="Standard">
      <style:text-properties officeooo:paragraph-rsid="0157b7c2"/>
    </style:style>
    <style:style style:name="P114" style:family="paragraph" style:parent-style-name="Table_20_Contents">
      <style:text-properties officeooo:rsid="01561d83" officeooo:paragraph-rsid="01561d83"/>
    </style:style>
    <style:style style:name="P115" style:family="paragraph" style:parent-style-name="Standard">
      <style:text-properties officeooo:rsid="0158007f" officeooo:paragraph-rsid="0158007f"/>
    </style:style>
    <style:style style:name="P116" style:family="paragraph" style:parent-style-name="Standard">
      <style:text-properties officeooo:rsid="0158007f" officeooo:paragraph-rsid="0158e7ed"/>
    </style:style>
    <style:style style:name="P117" style:family="paragraph" style:parent-style-name="Standard">
      <style:text-properties officeooo:rsid="0158e7ed" officeooo:paragraph-rsid="0158e7ed"/>
    </style:style>
    <style:style style:name="P118" style:family="paragraph" style:parent-style-name="Text_20_body">
      <style:text-properties officeooo:rsid="0158e7ed" officeooo:paragraph-rsid="0158e7ed"/>
    </style:style>
    <style:style style:name="P119" style:family="paragraph" style:parent-style-name="Standard">
      <style:text-properties officeooo:rsid="0158e7ed" officeooo:paragraph-rsid="01638080"/>
    </style:style>
    <style:style style:name="P120" style:family="paragraph" style:parent-style-name="Pascal">
      <style:text-properties officeooo:rsid="0159d89b" officeooo:paragraph-rsid="0159d89b"/>
    </style:style>
    <style:style style:name="P121" style:family="paragraph" style:parent-style-name="Standard">
      <style:text-properties officeooo:rsid="0159d89b" officeooo:paragraph-rsid="0159d89b"/>
    </style:style>
    <style:style style:name="P122" style:family="paragraph" style:parent-style-name="Text_20_body">
      <style:text-properties officeooo:rsid="0159d89b" officeooo:paragraph-rsid="0159d89b"/>
    </style:style>
    <style:style style:name="P123" style:family="paragraph" style:parent-style-name="Standard">
      <style:text-properties officeooo:rsid="015a68c0" officeooo:paragraph-rsid="015a68c0"/>
    </style:style>
    <style:style style:name="P124" style:family="paragraph" style:parent-style-name="Appendix">
      <style:text-properties officeooo:rsid="01696976" officeooo:paragraph-rsid="01696976"/>
    </style:style>
    <style:style style:name="P125" style:family="paragraph" style:parent-style-name="Text_20_body">
      <style:text-properties officeooo:rsid="01696976" officeooo:paragraph-rsid="01696976"/>
    </style:style>
    <style:style style:name="P126" style:family="paragraph" style:parent-style-name="Text_20_body" style:master-page-name="">
      <style:paragraph-properties fo:margin-top="0in" fo:margin-bottom="0in" style:contextual-spacing="false" style:page-number="auto"/>
      <style:text-properties officeooo:rsid="01696976" officeooo:paragraph-rsid="01696976"/>
    </style:style>
    <style:style style:name="P127" style:family="paragraph" style:parent-style-name="Text_20_body">
      <style:paragraph-properties fo:margin-top="0in" fo:margin-bottom="0in" style:contextual-spacing="false"/>
      <style:text-properties officeooo:rsid="01696976" officeooo:paragraph-rsid="01696976"/>
    </style:style>
    <style:style style:name="P128" style:family="paragraph" style:parent-style-name="Contents_20_1">
      <style:paragraph-properties>
        <style:tab-stops>
          <style:tab-stop style:position="6.2701in" style:leader-style="dotted" style:leader-text="."/>
          <style:tab-stop style:position="6.6945in" style:type="right" style:leader-style="dotted" style:leader-text="."/>
        </style:tab-stops>
      </style:paragraph-properties>
    </style:style>
    <style:style style:name="P129" style:family="paragraph" style:parent-style-name="Contents_20_2">
      <style:paragraph-properties>
        <style:tab-stops>
          <style:tab-stop style:position="6.2701in" style:leader-style="dotted" style:leader-text="."/>
          <style:tab-stop style:position="6.6945in" style:type="right" style:leader-style="dotted" style:leader-text="."/>
        </style:tab-stops>
      </style:paragraph-properties>
    </style:style>
    <style:style style:name="P130" style:family="paragraph" style:parent-style-name="Contents_20_3">
      <style:paragraph-properties>
        <style:tab-stops>
          <style:tab-stop style:position="6.2701in" style:leader-style="dotted" style:leader-text="."/>
          <style:tab-stop style:position="6.6945in" style:type="right" style:leader-style="dotted" style:leader-text="."/>
        </style:tab-stops>
      </style:paragraph-properties>
    </style:style>
    <style:style style:name="P131" style:family="paragraph" style:parent-style-name="Contents_20_4">
      <style:paragraph-properties>
        <style:tab-stops>
          <style:tab-stop style:position="6.2701in" style:leader-style="dotted" style:leader-text="."/>
          <style:tab-stop style:position="6.6945in" style:type="right" style:leader-style="dotted" style:leader-text="."/>
        </style:tab-stops>
      </style:paragraph-properties>
    </style:style>
    <style:style style:name="P132" style:family="paragraph" style:parent-style-name="Text_20_body">
      <style:text-properties officeooo:rsid="015f077d" officeooo:paragraph-rsid="015f077d"/>
    </style:style>
    <style:style style:name="P133" style:family="paragraph" style:parent-style-name="Text_20_body">
      <style:text-properties officeooo:rsid="01240032" officeooo:paragraph-rsid="0160089c"/>
    </style:style>
    <style:style style:name="P134" style:family="paragraph" style:parent-style-name="Text_20_body">
      <style:text-properties officeooo:rsid="0160089c" officeooo:paragraph-rsid="0160089c"/>
    </style:style>
    <style:style style:name="P135" style:family="paragraph" style:parent-style-name="Contents_20_1" style:master-page-name="Front_20_Right">
      <style:paragraph-properties style:page-number="auto">
        <style:tab-stops>
          <style:tab-stop style:position="6.2701in" style:type="right"/>
        </style:tab-stops>
      </style:paragraph-properties>
    </style:style>
    <style:style style:name="P136" style:family="paragraph" style:parent-style-name="Heading_20_1" style:master-page-name="Right_20_Page">
      <style:paragraph-properties style:page-number="1" fo:break-before="auto" fo:break-after="auto"/>
      <style:text-properties officeooo:paragraph-rsid="002a495c"/>
    </style:style>
    <style:style style:name="P137" style:family="paragraph" style:parent-style-name="Heading_20_1">
      <style:text-properties officeooo:paragraph-rsid="0148d2a8"/>
    </style:style>
    <style:style style:name="P138" style:family="paragraph" style:parent-style-name="Heading_20_2">
      <style:text-properties officeooo:rsid="0148d736" officeooo:paragraph-rsid="0148d736"/>
    </style:style>
    <style:style style:name="P139" style:family="paragraph" style:parent-style-name="Heading_20_2">
      <style:text-properties officeooo:rsid="0128e0a4" officeooo:paragraph-rsid="0148d2a8"/>
    </style:style>
    <style:style style:name="P140" style:family="paragraph" style:parent-style-name="Heading_20_2">
      <style:text-properties officeooo:rsid="0158007f" officeooo:paragraph-rsid="0158007f"/>
    </style:style>
    <style:style style:name="P141" style:family="paragraph" style:parent-style-name="Heading_20_2">
      <style:text-properties officeooo:rsid="010c2cf8" officeooo:paragraph-rsid="010c2cf8"/>
    </style:style>
    <style:style style:name="P142" style:family="paragraph" style:parent-style-name="Heading_20_2">
      <style:text-properties officeooo:rsid="010fa229" officeooo:paragraph-rsid="010fa229"/>
    </style:style>
    <style:style style:name="P143" style:family="paragraph" style:parent-style-name="Heading_20_2">
      <style:text-properties officeooo:rsid="0115cee3" officeooo:paragraph-rsid="0115cee3"/>
    </style:style>
    <style:style style:name="P144" style:family="paragraph" style:parent-style-name="Heading_20_2">
      <style:text-properties officeooo:rsid="0152e795" officeooo:paragraph-rsid="0152e795"/>
    </style:style>
    <style:style style:name="P145" style:family="paragraph" style:parent-style-name="Heading_20_3">
      <style:text-properties officeooo:rsid="0128e0a4" officeooo:paragraph-rsid="0148d2a8"/>
    </style:style>
    <style:style style:name="P146" style:family="paragraph" style:parent-style-name="Heading_20_3">
      <style:text-properties officeooo:paragraph-rsid="0148d2a8"/>
    </style:style>
    <style:style style:name="P147" style:family="paragraph" style:parent-style-name="Heading_20_3">
      <style:text-properties officeooo:rsid="014a7481" officeooo:paragraph-rsid="014a7481"/>
    </style:style>
    <style:style style:name="P148" style:family="paragraph" style:parent-style-name="Heading_20_3">
      <style:text-properties officeooo:rsid="0158e7ed" officeooo:paragraph-rsid="0158e7ed"/>
    </style:style>
    <style:style style:name="P149" style:family="paragraph" style:parent-style-name="Heading_20_3">
      <style:text-properties officeooo:rsid="0158e7ed" officeooo:paragraph-rsid="015a68c0"/>
    </style:style>
    <style:style style:name="P150" style:family="paragraph" style:parent-style-name="Heading_20_3">
      <style:text-properties officeooo:rsid="010fa229" officeooo:paragraph-rsid="010fa229"/>
    </style:style>
    <style:style style:name="P151" style:family="paragraph" style:parent-style-name="Heading_20_3">
      <style:text-properties officeooo:rsid="0110b519" officeooo:paragraph-rsid="0110b519"/>
    </style:style>
    <style:style style:name="P152" style:family="paragraph" style:parent-style-name="Heading_20_4">
      <style:text-properties officeooo:rsid="0149dee9" officeooo:paragraph-rsid="0149dee9"/>
    </style:style>
    <style:style style:name="P153"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154"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155" style:family="paragraph" style:parent-style-name="Standard" style:list-style-name="L7">
      <style:text-properties officeooo:rsid="0149dee9" officeooo:paragraph-rsid="0149dee9"/>
    </style:style>
    <style:style style:name="P156" style:family="paragraph" style:parent-style-name="Standard" style:list-style-name="L8">
      <style:text-properties officeooo:rsid="0149dee9" officeooo:paragraph-rsid="0149dee9"/>
    </style:style>
    <style:style style:name="P157" style:family="paragraph" style:parent-style-name="Standard" style:list-style-name="L9">
      <style:text-properties officeooo:rsid="010c2cf8" officeooo:paragraph-rsid="010c2cf8"/>
    </style:style>
    <style:style style:name="P158" style:family="paragraph" style:parent-style-name="Standard" style:list-style-name="L10">
      <style:text-properties officeooo:rsid="010c2cf8" officeooo:paragraph-rsid="010c2cf8"/>
    </style:style>
    <style:style style:name="P159" style:family="paragraph" style:parent-style-name="Standard" style:list-style-name="L10">
      <style:text-properties officeooo:paragraph-rsid="010c2cf8"/>
    </style:style>
    <style:style style:name="P160" style:family="paragraph" style:parent-style-name="Standard" style:list-style-name="L11">
      <style:text-properties officeooo:paragraph-rsid="010e0973"/>
    </style:style>
    <style:style style:name="P161" style:family="paragraph" style:parent-style-name="Standard" style:list-style-name="L11">
      <style:text-properties officeooo:paragraph-rsid="010fa229"/>
    </style:style>
    <style:style style:name="P162" style:family="paragraph" style:parent-style-name="Standard" style:list-style-name="L11">
      <style:text-properties officeooo:rsid="010e0973" officeooo:paragraph-rsid="010e0973"/>
    </style:style>
    <style:style style:name="P163" style:family="paragraph" style:parent-style-name="Standard" style:list-style-name="L13">
      <style:text-properties officeooo:rsid="0110b28a" officeooo:paragraph-rsid="0110b28a"/>
    </style:style>
    <style:style style:name="P164" style:family="paragraph" style:parent-style-name="Standard" style:list-style-name="L14">
      <style:text-properties officeooo:paragraph-rsid="0110b28a"/>
    </style:style>
    <style:style style:name="P165" style:family="paragraph" style:parent-style-name="Standard" style:list-style-name="L15">
      <style:text-properties officeooo:paragraph-rsid="0110b519"/>
    </style:style>
    <style:style style:name="P166" style:family="paragraph" style:parent-style-name="Standard" style:list-style-name="L16">
      <style:text-properties officeooo:paragraph-rsid="013d3280"/>
    </style:style>
    <style:style style:name="P167" style:family="paragraph" style:parent-style-name="Standard" style:list-style-name="L16">
      <style:text-properties officeooo:paragraph-rsid="0110b519"/>
    </style:style>
    <style:style style:name="P168" style:family="paragraph" style:parent-style-name="Standard" style:list-style-name="L16">
      <style:text-properties officeooo:rsid="014cd31b" officeooo:paragraph-rsid="014cd31b"/>
    </style:style>
    <style:style style:name="P169" style:family="paragraph" style:parent-style-name="Standard" style:list-style-name="L16">
      <style:text-properties officeooo:rsid="0113e8ea" officeooo:paragraph-rsid="0113e8ea"/>
    </style:style>
    <style:style style:name="P170" style:family="paragraph" style:parent-style-name="Table_20_Contents" style:list-style-name="L1">
      <style:paragraph-properties fo:keep-with-next="auto"/>
      <style:text-properties officeooo:rsid="01420b3e" officeooo:paragraph-rsid="0148d2a8"/>
    </style:style>
    <style:style style:name="P171" style:family="paragraph" style:parent-style-name="Table_20_Contents" style:list-style-name="L1">
      <style:paragraph-properties fo:keep-with-next="auto"/>
      <style:text-properties officeooo:rsid="01369f8c" officeooo:paragraph-rsid="0148d2a8"/>
    </style:style>
    <style:style style:name="P172" style:family="paragraph" style:parent-style-name="Text_20_body" style:list-style-name="L2">
      <style:text-properties officeooo:rsid="01469efe" officeooo:paragraph-rsid="01469efe"/>
    </style:style>
    <style:style style:name="P173" style:family="paragraph" style:parent-style-name="Text_20_body" style:list-style-name="L3">
      <style:text-properties officeooo:rsid="01469efe" officeooo:paragraph-rsid="01469efe"/>
    </style:style>
    <style:style style:name="P174" style:family="paragraph" style:parent-style-name="Text_20_body" style:list-style-name="L4">
      <style:text-properties officeooo:rsid="01469efe" officeooo:paragraph-rsid="01469efe"/>
    </style:style>
    <style:style style:name="P175" style:family="paragraph" style:parent-style-name="Text_20_body" style:list-style-name="L4">
      <style:text-properties officeooo:rsid="01470f8a" officeooo:paragraph-rsid="01470f8a"/>
    </style:style>
    <style:style style:name="P176" style:family="paragraph" style:parent-style-name="Text_20_body" style:list-style-name="L5">
      <style:text-properties officeooo:paragraph-rsid="00f410c5"/>
    </style:style>
    <style:style style:name="P177" style:family="paragraph" style:parent-style-name="Text_20_body" style:list-style-name="L5">
      <style:text-properties fo:font-style="normal" officeooo:rsid="00f410c5" officeooo:paragraph-rsid="00f410c5" style:font-style-asian="normal" style:font-style-complex="normal"/>
    </style:style>
    <style:style style:name="P178" style:family="paragraph" style:parent-style-name="Text_20_body" style:list-style-name="L6">
      <style:text-properties officeooo:rsid="0123c8f8" officeooo:paragraph-rsid="0148d2a8"/>
    </style:style>
    <style:style style:name="P179" style:family="paragraph" style:parent-style-name="Text_20_body" style:list-style-name="L12"/>
    <style:style style:name="P180" style:family="paragraph" style:parent-style-name="Text_20_body" style:list-style-name="L12">
      <style:text-properties officeooo:rsid="010e0973" officeooo:paragraph-rsid="010e0973"/>
    </style:style>
    <style:style style:name="P181" style:family="paragraph" style:parent-style-name="Text_20_body" style:list-style-name="L17"/>
    <style:style style:name="P182" style:family="paragraph" style:parent-style-name="Text_20_body" style:list-style-name="L17">
      <style:text-properties officeooo:paragraph-rsid="0152e795"/>
    </style:style>
    <style:style style:name="P183" style:family="paragraph" style:parent-style-name="Text_20_body" style:list-style-name="L17">
      <style:text-properties officeooo:rsid="0152e795" officeooo:paragraph-rsid="0152e795"/>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fo:font-style="italic" style:font-style-asian="italic" style:font-style-complex="italic"/>
    </style:style>
    <style:style style:name="T10" style:family="text">
      <style:text-properties fo:font-style="italic" officeooo:rsid="010c2cf8" style:font-style-asian="italic" style:font-style-complex="italic"/>
    </style:style>
    <style:style style:name="T11" style:family="text">
      <style:text-properties fo:font-style="italic" officeooo:rsid="014b00e4" style:font-style-asian="italic" style:font-style-complex="italic"/>
    </style:style>
    <style:style style:name="T12" style:family="text">
      <style:text-properties fo:font-style="italic" officeooo:rsid="0110b519" style:font-style-asian="italic" style:font-style-complex="italic"/>
    </style:style>
    <style:style style:name="T13" style:family="text">
      <style:text-properties fo:font-style="italic" officeooo:rsid="015f077d" style:font-style-asian="italic" style:font-style-complex="italic"/>
    </style:style>
    <style:style style:name="T14" style:family="text">
      <style:text-properties fo:font-style="italic" officeooo:rsid="01647472" style:font-style-asian="italic" style:font-style-complex="italic"/>
    </style:style>
    <style:style style:name="T15" style:family="text">
      <style:text-properties fo:font-style="italic" officeooo:rsid="01661b32"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f410c5" style:font-style-asian="normal" style:font-style-complex="normal"/>
    </style:style>
    <style:style style:name="T18" style:family="text">
      <style:text-properties fo:font-style="normal" officeooo:rsid="0138335b" style:font-style-asian="normal" style:font-style-complex="normal"/>
    </style:style>
    <style:style style:name="T19" style:family="text">
      <style:text-properties fo:color="#000000" loext:opacity="100%" style:font-name="Liberation Sans2" fo:font-size="11pt" fo:language="en" fo:country="GB" fo:font-style="normal" officeooo:rsid="0138335b" style:font-name-asian="Arial" style:font-size-asian="12pt" style:font-style-asian="normal" style:font-name-complex="CG Times" style:font-size-complex="10pt" style:language-complex="ar" style:country-complex="SA" style:font-style-complex="normal"/>
    </style:style>
    <style:style style:name="T20" style:family="text">
      <style:text-properties fo:color="#000000" loext:opacity="100%" style:font-name="Liberation Sans2" fo:font-size="11pt" fo:language="en" fo:country="GB" officeooo:rsid="012dd8e3" style:font-name-asian="Arial" style:font-size-asian="12pt" style:font-name-complex="CG Times" style:font-size-complex="10pt" style:language-complex="ar" style:country-complex="SA"/>
    </style:style>
    <style:style style:name="T21" style:family="text">
      <style:text-properties fo:color="#000000" loext:opacity="100%" style:font-name="Liberation Sans2" fo:font-size="11pt" fo:language="en" fo:country="GB" officeooo:rsid="01387918" style:font-name-asian="Arial" style:font-size-asian="12pt" style:font-name-complex="CG Times" style:font-size-complex="10pt" style:language-complex="ar" style:country-complex="SA"/>
    </style:style>
    <style:style style:name="T22" style:family="text">
      <style:text-properties fo:color="#000000" loext:opacity="100%" style:font-name="Liberation Sans2" fo:font-size="11pt" fo:language="en" fo:country="GB" officeooo:rsid="013efa9e" style:font-name-asian="Arial" style:font-size-asian="12pt" style:font-name-complex="CG Times" style:font-size-complex="10pt" style:language-complex="ar" style:country-complex="SA"/>
    </style:style>
    <style:style style:name="T23" style:family="text">
      <style:text-properties style:use-window-font-color="true" loext:opacity="0%" style:font-name="Arial" fo:font-size="24pt" fo:language="en" fo:country="GB" fo:font-weight="bold" officeooo:rsid="0123c8f8" style:font-name-asian="Arial" style:font-size-asian="16pt" style:font-weight-asian="bold" style:font-name-complex="CG Times" style:font-size-complex="10pt" style:language-complex="ar" style:country-complex="SA"/>
    </style:style>
    <style:style style:name="T24" style:family="text">
      <style:text-properties style:use-window-font-color="true" loext:opacity="0%" style:font-name="Liberation Sans2" fo:font-size="11pt" fo:language="en" fo:country="GB" style:font-name-asian="Times New Roman" style:font-size-asian="11pt" style:font-name-complex="CG Times" style:font-size-complex="10pt" style:language-complex="ar" style:country-complex="SA"/>
    </style:style>
    <style:style style:name="T25" style:family="text">
      <style:text-properties style:use-window-font-color="true" loext:opacity="0%" style:font-name="Liberation Sans2" fo:font-size="11pt" fo:language="en" fo:country="GB" officeooo:rsid="010c2cf8" style:font-name-asian="Times New Roman" style:font-size-asian="11pt" style:font-name-complex="CG Times" style:font-size-complex="10pt" style:language-complex="ar" style:country-complex="SA"/>
    </style:style>
    <style:style style:name="T26" style:family="text">
      <style:text-properties style:use-window-font-color="true" loext:opacity="0%" style:font-name="Liberation Sans2" fo:font-size="11pt" fo:language="en" fo:country="GB" officeooo:rsid="010e0973" style:font-name-asian="Times New Roman" style:font-size-asian="11pt" style:font-name-complex="CG Times" style:font-size-complex="10pt" style:language-complex="ar" style:country-complex="SA"/>
    </style:style>
    <style:style style:name="T27" style:family="text">
      <style:text-properties style:use-window-font-color="true" loext:opacity="0%" style:font-name="Liberation Sans2" fo:font-size="11pt" fo:language="en" fo:country="GB" officeooo:rsid="010fa229" style:font-name-asian="Times New Roman" style:font-size-asian="11pt" style:font-name-complex="CG Times" style:font-size-complex="10pt" style:language-complex="ar" style:country-complex="SA"/>
    </style:style>
    <style:style style:name="T28" style:family="text">
      <style:text-properties style:use-window-font-color="true" loext:opacity="0%" style:font-name="Liberation Sans2" fo:font-size="11pt" fo:language="en" fo:country="GB" officeooo:rsid="0110b519" style:font-name-asian="Times New Roman" style:font-size-asian="11pt" style:font-name-complex="CG Times" style:font-size-complex="10pt" style:language-complex="ar" style:country-complex="SA"/>
    </style:style>
    <style:style style:name="T29" style:family="text">
      <style:text-properties style:use-window-font-color="true" loext:opacity="0%" style:font-name="Liberation Sans2" fo:font-size="11pt" fo:language="en" fo:country="GB" officeooo:rsid="0115cee3" style:font-name-asian="Times New Roman" style:font-size-asian="11pt" style:font-name-complex="CG Times" style:font-size-complex="10pt" style:language-complex="ar" style:country-complex="SA"/>
    </style:style>
    <style:style style:name="T30" style:family="text">
      <style:text-properties style:use-window-font-color="true" loext:opacity="0%" style:font-name="Liberation Sans2" fo:font-size="11pt" fo:language="en" fo:country="GB" officeooo:rsid="0128e0a4" style:font-name-asian="Times New Roman" style:font-size-asian="11pt" style:font-name-complex="CG Times" style:font-size-complex="10pt" style:language-complex="ar" style:country-complex="SA"/>
    </style:style>
    <style:style style:name="T31" style:family="text">
      <style:text-properties style:use-window-font-color="true" loext:opacity="0%" style:font-name="Liberation Sans2" fo:font-size="11pt" fo:language="en" fo:country="GB" officeooo:rsid="01272b45" style:font-name-asian="Times New Roman" style:font-size-asian="11pt" style:font-name-complex="CG Times" style:font-size-complex="10pt" style:language-complex="ar" style:country-complex="SA"/>
    </style:style>
    <style:style style:name="T32" style:family="text">
      <style:text-properties style:use-window-font-color="true" loext:opacity="0%" style:font-name="Liberation Sans2" fo:font-size="11pt" fo:language="en" fo:country="GB" officeooo:rsid="0126c75f" style:font-name-asian="Times New Roman" style:font-size-asian="11pt" style:font-name-complex="CG Times" style:font-size-complex="10pt" style:language-complex="ar" style:country-complex="SA"/>
    </style:style>
    <style:style style:name="T33" style:family="text">
      <style:text-properties style:use-window-font-color="true" loext:opacity="0%" style:font-name="Liberation Sans2" fo:font-size="11pt" fo:language="en" fo:country="GB" officeooo:rsid="01349ba9" style:font-name-asian="Times New Roman" style:font-size-asian="11pt" style:font-name-complex="CG Times" style:font-size-complex="10pt" style:language-complex="ar" style:country-complex="SA"/>
    </style:style>
    <style:style style:name="T34" style:family="text">
      <style:text-properties style:use-window-font-color="true" loext:opacity="0%" style:font-name="Liberation Sans2" fo:font-size="11pt" fo:language="en" fo:country="GB" officeooo:rsid="013c044e" style:font-name-asian="Times New Roman" style:font-size-asian="11pt" style:font-name-complex="CG Times" style:font-size-complex="10pt" style:language-complex="ar" style:country-complex="SA"/>
    </style:style>
    <style:style style:name="T35" style:family="text">
      <style:text-properties style:use-window-font-color="true" loext:opacity="0%" style:font-name="Liberation Sans2" fo:font-size="11pt" fo:language="en" fo:country="GB" officeooo:rsid="013d3280" style:font-name-asian="Times New Roman" style:font-size-asian="11pt" style:font-name-complex="CG Times" style:font-size-complex="10pt" style:language-complex="ar" style:country-complex="SA"/>
    </style:style>
    <style:style style:name="T36" style:family="text">
      <style:text-properties style:use-window-font-color="true" loext:opacity="0%" style:font-name="Liberation Sans2" fo:font-size="11pt" fo:language="en" fo:country="GB" officeooo:rsid="01499d73" style:font-name-asian="Times New Roman" style:font-size-asian="11pt" style:font-name-complex="CG Times" style:font-size-complex="10pt" style:language-complex="ar" style:country-complex="SA"/>
    </style:style>
    <style:style style:name="T37" style:family="text">
      <style:text-properties style:use-window-font-color="true" loext:opacity="0%" style:font-name="Liberation Sans2" fo:font-size="11pt" fo:language="en" fo:country="GB" officeooo:rsid="0157b7c2" style:font-name-asian="Times New Roman" style:font-size-asian="11pt" style:font-name-complex="CG Times" style:font-size-complex="10pt" style:language-complex="ar" style:country-complex="SA"/>
    </style:style>
    <style:style style:name="T38" style:family="text">
      <style:text-properties style:use-window-font-color="true" loext:opacity="0%" style:font-name="Liberation Sans2" fo:font-size="11pt" fo:language="en" fo:country="GB" officeooo:rsid="0161f0e7" style:font-name-asian="Times New Roman" style:font-size-asian="11pt" style:font-name-complex="CG Times" style:font-size-complex="10pt" style:language-complex="ar" style:country-complex="SA"/>
    </style:style>
    <style:style style:name="T39" style:family="text">
      <style:text-properties style:use-window-font-color="true" loext:opacity="0%" style:font-name="Liberation Sans2" fo:font-size="11pt" fo:language="en" fo:country="GB" officeooo:rsid="0169d5f9" style:font-name-asian="Times New Roman" style:font-size-asian="11pt" style:font-name-complex="CG Times" style:font-size-complex="10pt" style:language-complex="ar" style:country-complex="SA"/>
    </style:style>
    <style:style style:name="T40" style:family="text">
      <style:text-properties officeooo:rsid="01058370"/>
    </style:style>
    <style:style style:name="T41" style:family="text">
      <style:text-properties officeooo:rsid="010a31f1"/>
    </style:style>
    <style:style style:name="T42" style:family="text">
      <style:text-properties officeooo:rsid="010c2cf8"/>
    </style:style>
    <style:style style:name="T43" style:family="text">
      <style:text-properties officeooo:rsid="010e0973"/>
    </style:style>
    <style:style style:name="T44" style:family="text">
      <style:text-properties officeooo:rsid="010fa229"/>
    </style:style>
    <style:style style:name="T45" style:family="text">
      <style:text-properties officeooo:rsid="0110b28a"/>
    </style:style>
    <style:style style:name="T46" style:family="text">
      <style:text-properties officeooo:rsid="0110b519"/>
    </style:style>
    <style:style style:name="T47" style:family="text">
      <style:text-properties officeooo:rsid="01118519"/>
    </style:style>
    <style:style style:name="T48" style:family="text">
      <style:text-properties officeooo:rsid="0112b987"/>
    </style:style>
    <style:style style:name="T49" style:family="text">
      <style:text-properties officeooo:rsid="0113e8ea"/>
    </style:style>
    <style:style style:name="T50" style:family="text">
      <style:text-properties officeooo:rsid="0115cee3"/>
    </style:style>
    <style:style style:name="T51" style:family="text">
      <style:text-properties officeooo:rsid="011d2686"/>
    </style:style>
    <style:style style:name="T52" style:family="text">
      <style:text-properties officeooo:rsid="011ea950"/>
    </style:style>
    <style:style style:name="T53" style:family="text">
      <style:text-properties officeooo:rsid="01240032"/>
    </style:style>
    <style:style style:name="T54" style:family="text">
      <style:text-properties officeooo:rsid="0124074b"/>
    </style:style>
    <style:style style:name="T55" style:family="text">
      <style:text-properties officeooo:rsid="0126c75f"/>
    </style:style>
    <style:style style:name="T56" style:family="text">
      <style:text-properties officeooo:rsid="0128e0a4"/>
    </style:style>
    <style:style style:name="T57" style:family="text">
      <style:text-properties officeooo:rsid="012c4d21"/>
    </style:style>
    <style:style style:name="T58" style:family="text">
      <style:text-properties officeooo:rsid="012dd8e3"/>
    </style:style>
    <style:style style:name="T59" style:family="text">
      <style:text-properties officeooo:rsid="012f0885"/>
    </style:style>
    <style:style style:name="T60" style:family="text">
      <style:text-properties officeooo:rsid="0130fe9e"/>
    </style:style>
    <style:style style:name="T61" style:family="text">
      <style:text-properties fo:language="en" fo:country="GB" style:language-complex="ar" style:country-complex="SA"/>
    </style:style>
    <style:style style:name="T62" style:family="text">
      <style:text-properties officeooo:rsid="01337abe"/>
    </style:style>
    <style:style style:name="T63" style:family="text">
      <style:text-properties officeooo:rsid="01349ba9"/>
    </style:style>
    <style:style style:name="T64" style:family="text">
      <style:text-properties officeooo:rsid="01369f8c"/>
    </style:style>
    <style:style style:name="T65" style:family="text">
      <style:text-properties officeooo:rsid="01387918"/>
    </style:style>
    <style:style style:name="T66" style:family="text">
      <style:text-properties officeooo:rsid="013c044e"/>
    </style:style>
    <style:style style:name="T67" style:family="text">
      <style:text-properties officeooo:rsid="013d3280"/>
    </style:style>
    <style:style style:name="T68" style:family="text">
      <style:text-properties officeooo:rsid="013efa9e"/>
    </style:style>
    <style:style style:name="T69" style:family="text">
      <style:text-properties officeooo:rsid="0123c8f8"/>
    </style:style>
    <style:style style:name="T70" style:family="text">
      <style:text-properties officeooo:rsid="0140a848"/>
    </style:style>
    <style:style style:name="T71" style:family="text">
      <style:text-properties officeooo:rsid="01420b3e"/>
    </style:style>
    <style:style style:name="T72" style:family="text">
      <style:text-properties officeooo:rsid="01450088"/>
    </style:style>
    <style:style style:name="T73" style:family="text">
      <style:text-properties officeooo:rsid="01455de7"/>
    </style:style>
    <style:style style:name="T74" style:family="text">
      <style:text-properties officeooo:rsid="01470f8a"/>
    </style:style>
    <style:style style:name="T75" style:family="text">
      <style:text-properties officeooo:rsid="0148d736"/>
    </style:style>
    <style:style style:name="T76" style:family="text">
      <style:text-properties officeooo:rsid="01496b74"/>
    </style:style>
    <style:style style:name="T77" style:family="text">
      <style:text-properties officeooo:rsid="01499d73"/>
    </style:style>
    <style:style style:name="T78" style:family="text">
      <style:text-properties officeooo:rsid="0149dee9"/>
    </style:style>
    <style:style style:name="T79" style:family="text">
      <style:text-properties officeooo:rsid="014b00e4"/>
    </style:style>
    <style:style style:name="T80" style:family="text">
      <style:text-properties officeooo:rsid="014cd31b"/>
    </style:style>
    <style:style style:name="T81" style:family="text">
      <style:text-properties officeooo:rsid="014ceb1c"/>
    </style:style>
    <style:style style:name="T82" style:family="text">
      <style:text-properties officeooo:rsid="01511067"/>
    </style:style>
    <style:style style:name="T83" style:family="text">
      <style:text-properties officeooo:rsid="0152e795"/>
    </style:style>
    <style:style style:name="T84" style:family="text">
      <style:text-properties officeooo:rsid="01552bae"/>
    </style:style>
    <style:style style:name="T85" style:family="text">
      <style:text-properties officeooo:rsid="01561d83"/>
    </style:style>
    <style:style style:name="T86" style:family="text">
      <style:text-properties officeooo:rsid="0157b7c2"/>
    </style:style>
    <style:style style:name="T87" style:family="text">
      <style:text-properties officeooo:rsid="0158007f"/>
    </style:style>
    <style:style style:name="T88" style:family="text">
      <style:text-properties officeooo:rsid="0158e7ed"/>
    </style:style>
    <style:style style:name="T89" style:family="text">
      <style:text-properties officeooo:rsid="015a68c0"/>
    </style:style>
    <style:style style:name="T90" style:family="text">
      <style:text-properties officeooo:rsid="015bafb3"/>
    </style:style>
    <style:style style:name="T91" style:family="text">
      <style:text-properties officeooo:rsid="015f077d"/>
    </style:style>
    <style:style style:name="T92" style:family="text">
      <style:text-properties officeooo:rsid="0160089c"/>
    </style:style>
    <style:style style:name="T93" style:family="text">
      <style:text-properties fo:font-weight="bold" style:font-weight-asian="bold" style:font-weight-complex="bold"/>
    </style:style>
    <style:style style:name="T94" style:family="text">
      <style:text-properties officeooo:rsid="0161f0e7"/>
    </style:style>
    <style:style style:name="T95" style:family="text">
      <style:text-properties officeooo:rsid="01638080"/>
    </style:style>
    <style:style style:name="T96" style:family="text">
      <style:text-properties officeooo:rsid="01647472"/>
    </style:style>
    <style:style style:name="T97" style:family="text">
      <style:text-properties officeooo:rsid="01661b32"/>
    </style:style>
    <style:style style:name="T98" style:family="text">
      <style:text-properties officeooo:rsid="01696976"/>
    </style:style>
    <style:style style:name="fr1"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3"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4"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visible-area-left="0in" draw:visible-area-top="0in" draw:visible-area-width="2.4039in" draw:visible-area-height="1.2071in"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41"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4"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153"><draw:frame draw:style-name="fr3" draw:name="Frame3" text:anchor-type="paragraph" svg:x="5.011in" svg:y="0.0008in" draw:z-index="1"><draw:text-box fo:min-height="0.1457in" fo:min-width="0.0161in"><text:p text:style-name="P31"><text:bookmark text:name="_1229237248"/></text:p></draw:text-box></draw:frame></text:p>
      <text:p text:style-name="P30"><draw:frame draw:style-name="fr2" draw:name="Frame1" text:anchor-type="paragraph" svg:x="0.0327in" svg:y="1.9in" svg:width="6.5055in" svg:height="5.3472in" draw:z-index="2"><draw:text-box><text:p text:style-name="P33">MWA Software</text:p><text:p text:style-name="P23"><text:span text:style-name="T3"><text:line-break/></text:span><text:span text:style-name="T5"><text:title>Pascal API 4 OpenSSL</text:title></text:span></text:p><text:p text:style-name="P9"/><text:p text:style-name="P9"><text:subject/></text:p><text:p text:style-name="P14"/></draw:text-box></draw:frame><draw:frame draw:style-name="fr1" draw:name="Frame2" text:anchor-type="paragraph" svg:y="8.6709in" svg:width="6.5173in" svg:height="1.0575in" draw:z-index="0"><draw:text-box><text:p text:style-name="P13"><text:user-defined style:data-style-name="N0" text:name="IssueNo">Issue 2.0</text:user-defined>, </text:p><text:p text:style-name="P13"><text:date style:data-style-name="N41" text:date-value="2026-05-19T15:17:21.774100670">19 May 2026</text:date></text:p><text:p text:style-name="P12"/><text:p text:style-name="P12"><text:user-defined style:data-style-name="N0" text:name="Company">MWA Software</text:user-defined></text:p><text:p text:style-name="P11"/><text:p text:style-name="P10">EMail: info@ mccallumwhyman.com, http://www.mccallumwhyman.com</text:p></draw:text-box></draw:frame></text:p>
      <text:p text:style-name="P154"/>
      <text:p text:style-name="P5"/>
      <text:p text:style-name="P5"/>
      <text:p text:style-name="P5"/>
      <text:p text:style-name="P5"/>
      <text:p text:style-name="P5"/>
      <text:p text:style-name="P5"/>
      <text:p text:style-name="P5"/>
      <text:p text:style-name="P5"/>
      <text:p text:style-name="P15">COPYRIGHT</text:p>
      <text:p text:style-name="P16"/>
      <text:p text:style-name="P32"><text:span text:style-name="T2">The copyright in this work is vested in </text:span><text:span text:style-name="T2"><text:user-defined style:data-style-name="N0" text:name="Company">MWA Software</text:user-defined></text:span><text:span text:style-name="T2">. </text:span><text:span text:style-name="T4">The contents of the document may be freely distributed and copied provided the source is correctly identified as this document. </text:span></text:p>
      <text:p text:style-name="P28"><text:span text:style-name="T2"><text:tab/>© Copyright </text:span><text:span text:style-name="T2"><text:user-defined style:data-style-name="N0" text:name="Company">MWA Software</text:user-defined></text:span><text:span text:style-name="T2"><text:s/>(</text:span><text:span text:style-name="T2"><text:creation-date style:data-style-name="N119">2024</text:creation-date></text:span><text:span text:style-name="T2">)</text:span><text:span text:style-name="T6">.</text:span></text:p>
      <text:p text:style-name="P2"/>
      <text:p text:style-name="P3">Disclaimer</text:p>
      <text:p text:style-name="P2"/>
      <text:p text:style-name="P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35"><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128">1 <text:s/>Introduction<text:tab/>1</text:p>
          <text:p text:style-name="P128">2 <text:s/>Using the OpenSSL API<text:tab/>3</text:p>
          <text:p text:style-name="P129">2.1 <text:s/>Selection of the OpenSSL Release<text:tab/>3</text:p>
          <text:p text:style-name="P129">2.2 <text:s/>Compile Time Code Selection<text:tab/>4</text:p>
          <text:p text:style-name="P130">2.2.1 <text:s/>Link Strategy Selection<text:tab/>4</text:p>
          <text:p text:style-name="P130">2.2.2 <text:s/>Legacy Support<text:tab/>4</text:p>
          <text:p text:style-name="P130">2.2.3 <text:s/>Memory Management<text:tab/>5</text:p>
          <text:p text:style-name="P130">2.2.4 <text:s/>Minimum Library Version Checking<text:tab/>5</text:p>
          <text:p text:style-name="P129">2.3 <text:s/>Run Time Interface<text:tab/>5</text:p>
          <text:p text:style-name="P130">2.3.1 <text:s/>The IOpenSSL Interface<text:tab/>5</text:p>
          <text:p text:style-name="P131">2.3.1.1 Windows OpenSSL Library Name<text:tab/>6</text:p>
          <text:p text:style-name="P130">2.3.2 <text:s/>The IOpenSSLDLL Interface<text:tab/>6</text:p>
          <text:p text:style-name="P130">2.3.3 <text:s/>Detecting the Header Version<text:tab/>10</text:p>
          <text:p text:style-name="P129">2.4 <text:s/>Windows Trusted Certificate Store Support<text:tab/>10</text:p>
          <text:p text:style-name="P130">2.4.1 <text:s/>Using the openssl_winx509 unit<text:tab/>11</text:p>
          <text:p text:style-name="P130">2.4.2 <text:s/>openssl_winx509 unit Link strategies<text:tab/>11</text:p>
          <text:p text:style-name="P128">3 <text:s/>Library Linking Strategies<text:tab/>13</text:p>
          <text:p text:style-name="P129">3.1 <text:s/>Static Linking<text:tab/>13</text:p>
          <text:p text:style-name="P130">3.1.1 <text:s/>Linking to a static library<text:tab/>14</text:p>
          <text:p text:style-name="P130">3.1.2 <text:s/>Linking to a shared library<text:tab/>14</text:p>
          <text:p text:style-name="P130">3.1.3 <text:s/>Implementation<text:tab/>14</text:p>
          <text:p text:style-name="P129">3.2 <text:s/>Dynamic Linking<text:tab/>15</text:p>
          <text:p text:style-name="P130">3.2.1 <text:s/>Implementation<text:tab/>15</text:p>
          <text:p text:style-name="P129">3.3 <text:s/>The OpenSSLAPI Unit<text:tab/>16</text:p>
          <text:p text:style-name="P128">4 <text:s/>Notes on the OpenSSLh2pas.sh Script<text:tab/>17</text:p>
          <text:p text:style-name="P129">4.1 <text:s/>Configuration File<text:tab/>18</text:p>
          <text:p text:style-name="P128"><text:s/>Appendix A - List of Modified Constant Names<text:tab/>19</text:p>
          <text:p text:style-name="P128"><text:s/>Appendix B - Allow Nil Functions<text:tab/>25</text:p>
        </text:index-body>
      </text:table-of-content>
      <text:p text:style-name="P4"/>
      <text:h text:style-name="P136" text:outline-level="1" text:restart-numbering="true" text:start-value="-1"><text:bookmark-start text:name="__RefHeading__1226_1812826207"/><text:line-break/>Introduction<text:bookmark-end text:name="__RefHeading__1226_1812826207"/></text:h>
      <text:p text:style-name="P55"><text:span text:style-name="T65">This document describes a Pascal Interface to the OpenSSL API. </text:span><text:span text:style-name="T40">OpenSSL is </text:span><text:span text:style-name="T65">itself </text:span><text:span text:style-name="T40">an open source code library providing an implementation </text:span><text:span text:style-name="T21">that includes</text:span><text:span text:style-name="T40"> the RFC 8446 </text:span>Transport Layer Security (TLS) Protocol Version 1.3. <text:span text:style-name="T40">(see https://www.openssl.org/)</text:span>.</text:p>
      <text:p text:style-name="Text_20_body">The OpenSSL library is written in 'C' and the programmatic interface is defined in a series of 'C' header files. These have to be translated into Pascal units in order to declare the interface to a Pascal code library.</text:p>
      <text:p text:style-name="P106">This translation is performed using MWA Software's<text:span text:style-name="T9"> h2pas</text:span><text:span text:style-name="T13">pp</text:span> utility. This allows for automated translation of 'C' headers into Pascal units with only limited manual control <text:span text:style-name="T84">needed </text:span>i.e.</text:p>
      <text:list text:style-name="L2">
        <text:list-item>
          <text:p text:style-name="P172">Patches to ensure dependency order <text:span text:style-name="T84">of constants </text:span>and to resolve issues with conditional compilation</text:p>
        </text:list-item>
        <text:list-item>
          <text:p text:style-name="P172">directions to ensure </text:p>
          <text:list>
            <text:list-item>
              <text:p text:style-name="P172">correct unit dependencies</text:p>
            </text:list-item>
            <text:list-item>
              <text:p text:style-name="P172">Macro argument and return types <text:span text:style-name="T84">where ambiguous</text:span></text:p>
            </text:list-item>
          </text:list>
        </text:list-item>
        <text:list-item>
          <text:p text:style-name="P172">Regular expressions that allow more efficient macro expansion to Pascal than which can reasonably be performed using automatic translation.</text:p>
        </text:list-item>
      </text:list>
      <text:p text:style-name="P106">A (bash) script is used to manage the translation of different header versions. This script and for each header in each version</text:p>
      <text:list text:style-name="L3">
        <text:list-item>
          <text:p text:style-name="P173">Patches the 'C' header if a patch is provided for that header.</text:p>
        </text:list-item>
        <text:list-item>
          <text:p text:style-name="P173">Run<text:span text:style-name="T84">s</text:span> the 'C' preprocessor (gcc -E) to perform macro expansion</text:p>
        </text:list-item>
        <text:list-item>
          <text:p text:style-name="P173">Runs <text:span text:style-name="T9">h2pas</text:span><text:span text:style-name="T13">pp</text:span><text:span text:style-name="T9"> </text:span>to perform that actual translation.</text:p>
        </text:list-item>
      </text:list>
      <text:p text:style-name="P106"><text:soft-page-break/>The result is a set of header files translated from 'C' to Pascal:</text:p>
      <text:list text:style-name="L4">
        <text:list-item>
          <text:p text:style-name="P174">With comments in their original positions</text:p>
        </text:list-item>
        <text:list-item>
          <text:p text:style-name="P174">Conditional compilation directive<text:span text:style-name="T84">s</text:span> passed through and translated to Pascal conditional compilation directives.</text:p>
        </text:list-item>
        <text:list-item>
          <text:p text:style-name="P175">And which support three different link models:</text:p>
        </text:list-item>
      </text:list>
      <text:list text:style-name="L5">
        <text:list-item>
          <text:list>
            <text:list-item>
              <text:p text:style-name="P177">Compile time linkage to a shared (.so or .dll) library</text:p>
            </text:list-item>
            <text:list-item>
              <text:p text:style-name="P177">Compile time linkage to a static library <text:span text:style-name="T74">(libssl.a and lib</text:span><text:span text:style-name="T76">crypto</text:span><text:span text:style-name="T74">.a)</text:span></text:p>
            </text:list-item>
            <text:list-item>
              <text:p text:style-name="P176"><text:span text:style-name="T17">Dynamic Library Load and the run time </text:span><text:span text:style-name="T19">resolution</text:span><text:span text:style-name="T17"> </text:span><text:span text:style-name="T18">of</text:span><text:span text:style-name="T17"> each API call </text:span><text:span text:style-name="T18">used</text:span><text:span text:style-name="T17">.</text:span></text:p>
            </text:list-item>
          </text:list>
        </text:list-item>
      </text:list>
      <text:p text:style-name="P53">The “headers” folder <text:span text:style-name="T84">in the source code distrbution </text:span>contains generated headers for each OpenSSL release <text:span text:style-name="T84">translated</text:span>. Additionally, the “headersWithLegacySupport” folder contains the OpenSSL 3.0 headers with additional support for backwards compatibility for OpenSSL 1.0.2 and 1.1.0.</text:p>
      <text:p text:style-name="P45"><text:span text:style-name="T84">Note.</text:span> Compatibility is limited to core functions only and specifically those needed to support the Indy Library.</text:p>
      <text:p text:style-name="P54"><text:span text:style-name="T74">The headers</text:span> are derived from the OpenSSL source code and hence are distributed using the same Apache License v2.0 as OpenSSL itself.</text:p>
      <text:p text:style-name="P46">Note. The API is large <text:span text:style-name="T91">(over 191K lines for the OpenSSL 4.0.0 Pascal Headers) </text:span>and while the core functionality has been tested using the IndySecOpenSSL package,it is not <text:span text:style-name="T91">currently </text:span>feasible to extensively test all translated headers other than by a “Clean Compile”. Users must obtain their own confidence in their use of these headers through their own testing. The Pascal OpenSSL headers are distributed in the hope that they may be useful but with no war<text:span text:style-name="T85">r</text:span>antee whatsoever.</text:p>
      <text:h text:style-name="P137" text:outline-level="1"><text:bookmark-start text:name="__RefNumPara__2966_1056010645"/><text:bookmark-start text:name="__RefHeading___Toc2698_1056010645"/><text:line-break/><text:span text:style-name="T23">Using the OpenSSL API</text:span><text:bookmark-end text:name="__RefNumPara__2966_1056010645"/><text:bookmark-end text:name="__RefHeading___Toc2698_1056010645"/></text:h>
      <text:p text:style-name="P105">The header files <text:span text:style-name="T75">for </text:span><text:span text:style-name="T85">whichever</text:span><text:span text:style-name="T75"> OpenSSL release</text:span> <text:span text:style-name="T85">is </text:span><text:span text:style-name="T75">appropriate </text:span><text:span text:style-name="T85">for you </text:span>should be copied into your project/<text:span text:style-name="T55">package</text:span>. It is recommended that they are all placed in a dedicated subdirectory and, the project options <text:span text:style-name="T55">are </text:span>set <text:span text:style-name="T55">such that </text:span>the unit and include file search paths include this subdirectory. </text:p>
      <text:p text:style-name="P37">Note. In order to avoid linking in OpenSSL header units unnecessarily, <text:span text:style-name="T75">ideally </text:span>these units should not be explicitly added to your project or package. <text:span text:style-name="T91">Only the search path should be specified.</text:span></text:p>
      <text:p text:style-name="P104">In order to use an API call it is sufficient to include the appropriate header file unit <text:span text:style-name="T68">name</text:span> in your unit's uses clause and call the API call as a normal function or procedure. This is regardless of whether static or dynamic linking is used. <text:span text:style-name="T57">Each API call has the same name as the original OpenSSL 'C' API call and the header file unit names follow the OpenSSL header naming conventions. The OpenSSL Documentation should be consulted for the semantics of each API call.</text:span></text:p>
      <text:p text:style-name="P43">Note. See Appendix A for handling of case insensitive name clashes.</text:p>
      <text:p text:style-name="P97">With dynamic linking, there is no need to explicitly load the library prior to use as it is implicitly loaded and initialised when the first API call is called. With static linking, the library must be explicitly initialised prior to use (see <text:bookmark-ref text:reference-format="number" text:ref-name="__RefNumPara__1913_1056010645">2.3.1</text:bookmark-ref>).</text:p>
      <text:h text:style-name="P138" text:outline-level="2"><text:bookmark-start text:name="__RefHeading___Toc2473_935133783"/>Selection of the OpenSSL Release<text:bookmark-end text:name="__RefHeading___Toc2473_935133783"/></text:h>
      <text:p text:style-name="P72">If in doubt, you should use the most recent OpenSSL 3.0.x headers (3.0.20 at the time of writing). These include all core functionality and are typically compatible with later OpenSSL releases (although this is not guaranteed and runtime testing is advised).</text:p>
      <text:p text:style-name="P35">Note. Currently, it appears that OpenSSL 4.0.0 libraries are backwards compatible with OpenSSL 3.0.20 headers - <text:span text:style-name="T91">at least for common API calls.</text:span></text:p>
      <text:p text:style-name="P52">If you need specific functionality only available in later releases of OpenSSL then, <text:span text:style-name="T91">in most cases,</text:span> you should use the headers from the release from which this functionality was <text:span text:style-name="T85">added</text:span>.</text:p>
      <text:h text:style-name="P139" text:outline-level="2"><text:bookmark-start text:name="__RefHeading___Toc2700_1056010645"/><text:soft-page-break/>Compile Time Code Selection<text:bookmark-end text:name="__RefHeading___Toc2700_1056010645"/></text:h>
      <text:p text:style-name="P81">The following header file options may be selected at compile time.</text:p>
      <text:h text:style-name="P145" text:outline-level="3"><text:bookmark-start text:name="__RefHeading___Toc2702_1056010645"/>Link Strategy Selection<text:bookmark-end text:name="__RefHeading___Toc2702_1056010645"/></text:h>
      <text:p text:style-name="P88">If in doubt, dynamic linking is recommended.</text:p>
      <text:p text:style-name="P71"><text:span text:style-name="T69">If static linking is </text:span><text:span text:style-name="T22">required</text:span><text:span text:style-name="T69"> then your program (or package) must be compiled with the defined symbol:</text:span></text:p>
      <text:list text:style-name="L6">
        <text:list-item>
          <text:p text:style-name="P178">OPENSSL_USE_STATIC_LIBRARY, or</text:p>
        </text:list-item>
        <text:list-item>
          <text:p text:style-name="P178">OPENSSL_USE_SHARED_LIBRARY.</text:p>
        </text:list-item>
      </text:list>
      <text:p text:style-name="P104">The former selects linking to <text:span text:style-name="T53">static OpenSSL libraries (</text:span><text:span text:style-name="T55">e.g. </text:span><text:span text:style-name="T53">libssl.a and libcrypto.a), while the latter selects linking to shared OpenSSL libraries (.so/.dll). </text:span></text:p>
      <text:p text:style-name="P132">The main difference between the two is that static OpenSSL Libraries are linked into the program executable by the linker and are hence distributed as part of the program executable. In the later case, the shared library is loaded and linked to your program executable at program load time. The former has the advantage that your can guarantee the version of OpenSSL that your application uses. The later minimises the size of the executable whilst adds the risk that an unexpected version of the OpenSSL libraries are used.</text:p>
      <text:p text:style-name="P89"><text:span text:style-name="T92">When linking to static libraries</text:span>, the library version should be the same as the headers. <text:span text:style-name="T92">When linking to shared libraries</text:span>, the OpenSSL library (dll or so) should be the same or a later version (assuming backwards compatibility).</text:p>
      <text:p text:style-name="P133"><text:span text:style-name="T93">Dynamic linking</text:span> is the default (neither symbol is defined). In this case, the dynamic library loader (in the OpenSSLAPI unit) searches for the shared OpenSSL libraries <text:span text:style-name="T76">and attempts to load the most recent compatible with the headers. It is generally the most flexible option. </text:span></text:p>
      <text:p text:style-name="P134">Otherwise, this strategy's advantages and disadvantages are the same as for linking to shared libraries at program load time, except that program load time should be minimised and your program should not fail to load if the OpenSSL shared library version on the target system does not include an API call that is included in the header files but is not used by your application.</text:p>
      <text:p text:style-name="P38"><text:span text:style-name="T64">Note: </text:span><text:span text:style-name="T54">Th</text:span><text:span text:style-name="T64">e OpenSSLAPI</text:span><text:span text:style-name="T54"> unit is always included by default if an OpenSSL Header unit is included in your project.</text:span></text:p>
      <text:h text:style-name="P146" text:outline-level="3"><text:bookmark-start text:name="__RefNumPara__1858_1580953688"/><text:bookmark-start text:name="__RefHeading___Toc2704_1056010645"/>Legacy Support<text:bookmark-end text:name="__RefNumPara__1858_1580953688"/><text:bookmark-end text:name="__RefHeading___Toc2704_1056010645"/></text:h>
      <text:p text:style-name="P80">Primarily in support of Indy, header files <text:span text:style-name="T94">proving legacy support </text:span>include compatibility functions to enable the use of OpenSSL from <text:span text:style-name="T94">release </text:span>1.0.2 or later (with dynamic library load). These compatibility functions <text:span text:style-name="T77">r</text:span>eplace <text:span text:style-name="T77">some </text:span>OpenSSL 3.0 API calls <text:span text:style-name="T77">when not found to be present on load, </text:span>with functions that call equivalent functions in earlier versions of OpenSSL <text:span text:style-name="T94">and which emulate the missing 3.0 API call</text:span>.</text:p>
      <text:p text:style-name="P80"><text:span text:style-name="T77">I</text:span>f your application only uses OpenSSL 3.0.0 and 3.0.0 <text:span text:style-name="T77">or later libraries</text:span> then the compatibility functions can be ignored at compile time by compiling with the defined symbol:</text:p>
      <text:p text:style-name="P69">OPENSSL_NO_LEGACY_SUPPORT</text:p>
      <text:p text:style-name="P80"><text:soft-page-break/><text:span text:style-name="T77">or by simply using the standard release 3.0.20 headers. </text:span>This should avoid unnecessary program bloat.</text:p>
      <text:h text:style-name="P146" text:outline-level="3"><text:bookmark-start text:name="__RefHeading___Toc2706_1056010645"/>Memory Management<text:bookmark-end text:name="__RefHeading___Toc2706_1056010645"/></text:h>
      <text:p text:style-name="P82">OpenSSL's internal memory management functions can be replaced by the Pascal Memory Manager by <text:span text:style-name="T55">compiling with the defined symbol:</text:span></text:p>
      <text:p text:style-name="P69">OPENSSL_SET_MEMORY_FUNCS</text:p>
      <text:p text:style-name="P82">This may be useful for debugging e.g. reporting memory leaks on completion.</text:p>
      <text:h text:style-name="P146" text:outline-level="3"><text:bookmark-start text:name="__RefHeading___Toc2708_1056010645"/>Minimum Library Version Checking<text:bookmark-end text:name="__RefHeading___Toc2708_1056010645"/></text:h>
      <text:p text:style-name="P69"><text:span text:style-name="T68">B</text:span><text:span text:style-name="T56">y default, the OpenSSL API dynamic library loader checks the library version and </text:span><text:span text:style-name="T30">raises an exception if the </text:span><text:span text:style-name="T39">major and minor </text:span><text:span text:style-name="T30">version number</text:span><text:span text:style-name="T39">s</text:span><text:span text:style-name="T30"> </text:span><text:span text:style-name="T39">are</text:span><text:span text:style-name="T30"> less that </text:span><text:span text:style-name="T38">of the header files used</text:span><text:span text:style-name="T30"> </text:span><text:span text:style-name="T36">(or 1.0.2 for legacy support)</text:span><text:span text:style-name="T30">. This can be turned off </text:span><text:span text:style-name="T31">by </text:span><text:span text:style-name="T32">compiling with the defined symbol</text:span></text:p>
      <text:p text:style-name="P84">OPENSSL_NO_MIN_VERSION</text:p>
      <text:p text:style-name="P85">Note. If this option is not turned off then the effect is to force the OpenSSL shared library minimum version number to be the same as the header files or later.</text:p>
      <text:h text:style-name="P139" text:outline-level="2"><text:bookmark-start text:name="__RefHeading___Toc2710_1056010645"/>Run Time Interface<text:bookmark-end text:name="__RefHeading___Toc2710_1056010645"/></text:h>
      <text:p text:style-name="P86">The OpenSSLAPI unit provides two Pascal COM interfaces which provide information and option selection for the OpenSSL Library.</text:p>
      <text:h text:style-name="P146" text:outline-level="3"><text:bookmark-start text:name="__RefNumPara__1913_1056010645"/><text:bookmark-start text:name="__RefHeading___Toc2712_1056010645"/>The IOpenSSL Interface<text:bookmark-end text:name="__RefNumPara__1913_1056010645"/><text:bookmark-end text:name="__RefHeading___Toc2712_1056010645"/></text:h>
      <text:p text:style-name="P86">This interface is available for all link strategies and the interface is accessed using the function:</text:p>
      <text:p text:style-name="P64"><text:s text:c="2"/>function GetIOpenSSL: I<text:span text:style-name="T68">O</text:span>penSSL;</text:p>
      <text:p text:style-name="P108"><text:span text:style-name="T58">The interface is </text:span><text:span text:style-name="T20">declared</text:span><text:span text:style-name="T58"> as:</text:span></text:p>
      <text:p text:style-name="P108"><text:s text:c="2"/>TOpenSSL_LinkModel = (lmDynamic, lmShared, lmStatic);</text:p>
      <text:p text:style-name="P67"/>
      <text:p text:style-name="P68"><text:s text:c="2"/>IOpenSSL = interface</text:p>
      <text:p text:style-name="P68"><text:s text:c="2"/>['{aed66223-1700-4199-b1c5-8222648e8cd5}']</text:p>
      <text:p text:style-name="P68"><text:s text:c="4"/>function GetOpenSSLPath: string;</text:p>
      <text:p text:style-name="P68"><text:s text:c="4"/>function GetOpenSSLVersionStr: string;</text:p>
      <text:p text:style-name="P68"><text:s text:c="4"/>function GetOpenSSLVersion: TopenSSL_C_ULONG;</text:p>
      <text:p text:style-name="P68"><text:s text:c="4"/><text:span text:style-name="T73">f</text:span>unction GetLinkModel: TOpenSSL_LinkModel;</text:p>
      <text:p text:style-name="P68"><text:s text:c="4"/>function Init: boolean;</text:p>
      <text:p text:style-name="P68"><text:s text:c="2"/>end;</text:p>
      <table:table table:name="Table2" table:style-name="Table2">
        <table:table-column table:style-name="Table2.A"/>
        <table:table-column table:style-name="Table2.B"/>
        <table:table-row>
          <table:table-cell table:style-name="Table2.A1" office:value-type="string">
            <text:p text:style-name="P66">function GetOpenSSLPath: string</text:p>
          </table:table-cell>
          <table:table-cell table:style-name="Table2.B1" office:value-type="string">
            <text:p text:style-name="P95"><text:span text:style-name="T64">Static Linking: </text:span>Returns the <text:s/>OpenSSL installation path as compiled into the OpenSSL library.</text:p>
            <text:p text:style-name="P94">Dynamic Loading: Returns </text:p>
            <text:list text:style-name="L1">
              <text:list-item>
                <text:p text:style-name="P170">The same as above when the library is loaded</text:p>
              </text:list-item>
              <text:list-item>
                <text:p text:style-name="P171"><text:soft-page-break/>the specified <text:span text:style-name="T58">OpenSSL installation path, </text:span><text:span text:style-name="T71">otherwise.</text:span></text:p>
              </text:list-item>
            </text:list>
            <text:p text:style-name="P42">Note. May be empty.</text:p>
          </table:table-cell>
        </table:table-row>
        <table:table-row>
          <table:table-cell table:style-name="Table2.A2" office:value-type="string">
            <text:p text:style-name="P66">function GetOpenSSLVersionStr: string</text:p>
          </table:table-cell>
          <table:table-cell table:style-name="Table2.B2" office:value-type="string">
            <text:p text:style-name="P95">Returns the OpenSSL library version string. <text:span text:style-name="T59">e.g <text:line-break/>“OpenSSL 3.2.0 23 Nov 2023”</text:span></text:p>
          </table:table-cell>
        </table:table-row>
        <table:table-row>
          <table:table-cell table:style-name="Table2.A2" office:value-type="string">
            <text:p text:style-name="P66">function GetOpenSSLVersion: TOpenSSL_C_ULONG</text:p>
          </table:table-cell>
          <table:table-cell table:style-name="Table2.B2" office:value-type="string">
            <text:p text:style-name="P96">Returns the OpenSSL library version as an integer <text:span text:style-name="T64">as defined by the OpenSSL documentation.</text:span></text:p>
          </table:table-cell>
        </table:table-row>
        <table:table-row>
          <table:table-cell table:style-name="Table2.A2" office:value-type="string">
            <text:p text:style-name="P66"><text:span text:style-name="T73">f</text:span>unction GetLinkModel: TOpenSSL_LinkModel;</text:p>
          </table:table-cell>
          <table:table-cell table:style-name="Table2.B2" office:value-type="string">
            <text:p text:style-name="P98">Returns the Link Model used. Values:</text:p>
            <text:p text:style-name="P98">lmDynamic, lmShared, lmStatic</text:p>
          </table:table-cell>
        </table:table-row>
        <table:table-row>
          <table:table-cell table:style-name="Table2.A2" office:value-type="string">
            <text:p text:style-name="P66">function Init: boolean</text:p>
          </table:table-cell>
          <table:table-cell table:style-name="Table2.B5" office:value-type="string">
            <text:p text:style-name="P96">Called to initialise the OpenSSL library prior to use. This must be called when using static linking. It is optional for dynamic linking (implicitly called on library load).</text:p>
            <text:p text:style-name="P114">Returns true on success.</text:p>
          </table:table-cell>
        </table:table-row>
      </table:table>
      <text:p text:style-name="P67"/>
      <text:h text:style-name="P152" text:outline-level="4"><text:bookmark-start text:name="__RefHeading___Toc2475_935133783"/>Windows OpenSSL Library Name<text:bookmark-end text:name="__RefHeading___Toc2475_935133783"/></text:h>
      <text:p text:style-name="P77">By default, the Windows DLL names for the OpenSSL libraries default to:</text:p>
      <text:list text:style-name="L7">
        <text:list-item>
          <text:p text:style-name="P155">libcrypto-3-x64.dll and libssl-3-x64.dll (64-bit), or</text:p>
        </text:list-item>
        <text:list-item>
          <text:p text:style-name="P155">libcrypto-3.dll and libssl-3.dll (32-bit)</text:p>
        </text:list-item>
      </text:list>
      <text:p text:style-name="P77">If the symbol USE_OPENSSL_VERSION_4 is defined then the Windows DLL names for the OpenSSL libraries default to:</text:p>
      <text:list text:style-name="L8">
        <text:list-item>
          <text:p text:style-name="P156">libcrypto-4-x64.dll and libssl-4-x64.dll (64,bit) or</text:p>
        </text:list-item>
        <text:list-item>
          <text:p text:style-name="P156">libcrypto-4.dll and libssl-4.dll (32 bit)</text:p>
        </text:list-item>
      </text:list>
      <text:p text:style-name="P77">When OpenSSL 4.x.x headers are used then USE_OPENSSL_VERSION_4 should be automatically defined.</text:p>
      <text:h text:style-name="P146" text:outline-level="3"><text:bookmark-start text:name="__RefHeading___Toc2714_1056010645"/>The IOpenSSLDLL Interface<text:bookmark-end text:name="__RefHeading___Toc2714_1056010645"/></text:h>
      <text:p text:style-name="P79">This interface is only available when the API is configured at compile time for dynamic library loading. The interface is accessed using the function:</text:p>
      <text:p text:style-name="P78">function GetIOpenSSLDDL: IOpenSSLDLL; </text:p>
      <text:p text:style-name="P79">This function returns “nil” if the interface is not available. This may be used as a runtime test to determine if dynamic library loading if been configured.</text:p>
      <text:p text:style-name="P87">Note <text:span text:style-name="T60">The OpenSSLAPI unit </text:span><text:span text:style-name="T70">only </text:span><text:span text:style-name="T60">declares the constant </text:span></text:p>
      <text:p text:style-name="P64"><text:soft-page-break/>OpenSSL_Using_Dynamic_Library_Load <text:span text:style-name="T61">= true;</text:span></text:p>
      <text:p text:style-name="P83"><text:span text:style-name="T70">w</text:span>hen configured at compile time for dynamic library loading. The constant is not declared otherwise. This feature may <text:span text:style-name="T85">also </text:span>be used as a compile time test for the <text:span text:style-name="T70">dynamic</text:span> library loading strategy e.g.</text:p>
      <text:p text:style-name="P78">{$if declared(OpenSSL_Using_Dynamic_Library_Load)}</text:p>
      <text:p text:style-name="P78">…</text:p>
      <text:p text:style-name="P78">{$ifend}</text:p>
      <text:p text:style-name="P107">Similarly, the constant </text:p>
      <text:p text:style-name="P64">OpenSSL_Using_Shared_Library = true;</text:p>
      <text:p text:style-name="P107">is only declared when using the share library link model.</text:p>
      <text:p text:style-name="P71"><text:span text:style-name="T64">T</text:span><text:span text:style-name="T58">he interface </text:span><text:span text:style-name="T62">includes the IOpenSSL interface </text:span><text:span text:style-name="T64">and </text:span><text:span text:style-name="T58">is </text:span><text:span text:style-name="T20">declared</text:span><text:span text:style-name="T58"> as:</text:span></text:p>
      <text:p text:style-name="P67"><text:s text:c="2"/>IOpenSSLDLL = interface(IOpenSSL)</text:p>
      <text:p text:style-name="P68"><text:s text:c="4"/>procedure SetOpenSSLPath(const Value: string);</text:p>
      <text:p text:style-name="P64"><text:s text:c="4"/>function GetSSLLibVersions: string;</text:p>
      <text:p text:style-name="P64"><text:s text:c="4"/>procedure SetSSLLibVersions(AValue: string);</text:p>
      <text:p text:style-name="P64"><text:s text:c="4"/>function GetSSLBaseLibName: string;</text:p>
      <text:p text:style-name="P64"><text:s text:c="4"/>procedure SetSSLBaseLibName(AValue: string);</text:p>
      <text:p text:style-name="P64"><text:s text:c="4"/>function GetCryptoBaseLibName: string;</text:p>
      <text:p text:style-name="P64"><text:s text:c="4"/>procedure SetCryptoBaseLibName(AValue: string);</text:p>
      <text:p text:style-name="P64"><text:s text:c="4"/>function GetAllowLegacyLibsFallback: boolean;</text:p>
      <text:p text:style-name="P64"><text:s text:c="4"/>procedure SetAllowLegacyLibsFallback(AValue: boolean);</text:p>
      <text:p text:style-name="P64"><text:s text:c="4"/>function GetLibCryptoHandle: TLibHandle;</text:p>
      <text:p text:style-name="P64"><text:s text:c="4"/>function GetLibSSLHandle: TLibHandle;</text:p>
      <text:p text:style-name="P64"><text:s text:c="4"/>function GetLibCryptoFilePath: string;</text:p>
      <text:p text:style-name="P64"><text:s text:c="4"/>function GetLibSSLFilePath: string;</text:p>
      <text:p text:style-name="P64"><text:s text:c="4"/>function Load: Boolean;</text:p>
      <text:p text:style-name="P64"><text:s text:c="4"/>procedure Unload;</text:p>
      <text:p text:style-name="P64"><text:s text:c="4"/>function IsLoaded: boolean;</text:p>
      <text:p text:style-name="P64"><text:s text:c="4"/>property SSLLibVersions: string read GetSSLLibVersions write SetSSLLibVersions;</text:p>
      <text:p text:style-name="P64"><text:s text:c="4"/>property SSLBaseLibame: string read GetSSLBaseLibName write SetSSLBaseLibName;</text:p>
      <text:p text:style-name="P64"><text:s text:c="4"/>property CryptoBaseLibName: string read GetCryptoBaseLibName </text:p>
      <text:p text:style-name="P64"><text:s text:c="39"/>write SetCryptoBaseLibName;</text:p>
      <text:p text:style-name="P64"><text:s text:c="4"/>property AllowLegacyLibsFallback: boolean read GetAllowLegacyLibsFallback </text:p>
      <text:p text:style-name="P64"><text:s text:c="38"/>write SetAllowLegacyLibsFallback;end;</text:p>
      <text:p text:style-name="P68"/>
      <table:table table:name="Table4" table:style-name="Table4">
        <table:table-column table:style-name="Table4.A"/>
        <table:table-column table:style-name="Table4.B"/>
        <table:table-row table:style-name="Table4.1">
          <table:table-cell table:style-name="Table4.A1" office:value-type="string">
            <text:p text:style-name="P66">procedure SetOpenSSLPath(const Value: string);</text:p>
          </table:table-cell>
          <table:table-cell table:style-name="Table4.B1" office:value-type="string">
            <text:p text:style-name="P99">This sets the OpenSSLPath used to locate the OpenSSL library modules (e.g. libcrypto.so). It needs to be set when OpenSSL has not been installed in a default location and/or multiple versions of OpenSSL have been installed on the same system.</text:p>
            <text:p text:style-name="P100">This may be empty (default), contain a single path, or a colon (Unix) or semi-colon (Windows) separated list of paths to try in order.</text:p>
          </table:table-cell>
        </table:table-row>
        <text:soft-page-break/>
        <table:table-row table:style-name="Table4.1">
          <table:table-cell table:style-name="Table4.A2" office:value-type="string">
            <text:p text:style-name="P65">function GetSSLLibVersions: string;</text:p>
            <text:p text:style-name="P65"/>
            <text:p text:style-name="P65">procedure SetSSLLibVersions(AValue: string);</text:p>
          </table:table-cell>
          <table:table-cell table:style-name="Table4.B2" office:value-type="string">
            <text:p text:style-name="P99">This is a colon separated (Unixes) or semi-colon separated (Windows) ordered list of OpenSSL version numbers that can be used as suffices for the OpenSSL library modules (e.g. <text:span text:style-name="T72">for </text:span>libcrypto-3-x64.dll, <text:span text:style-name="T72">the suffix is '-3-x64')</text:span>.</text:p>
            <text:p text:style-name="P99">When searching for the OpenSSL library, the loader searches the default (or specified) OpenSSLPath for OpenSSL libraries using these suffices in turn. <text:span text:style-name="T77">For dynamic loading:</text:span></text:p>
            <text:p text:style-name="P99">Unix: defaults to</text:p>
            <text:p text:style-name="P99"><text:s/>'.<text:span text:style-name="T77">4:</text:span>.3:.1.1:.1.0.2:.1.0.0:.0.9.9:.0.9.8:.0.9.7:.0.9.6'</text:p>
            <text:p text:style-name="P99">Note includes legacy versions.</text:p>
            <text:p text:style-name="P99">Windows defaults to</text:p>
            <text:p text:style-name="P99">'-<text:span text:style-name="T77">4-x64;</text:span>-3-x64;-1-x64;' (64 bit)</text:p>
            <text:p text:style-name="P99">'-<text:span text:style-name="T77">4;</text:span>-3;-1;' (32 bit)</text:p>
            <text:p text:style-name="P41">Changing the libversions will automatically unload the ssl and crypto libraries if currently loaded.</text:p>
          </table:table-cell>
        </table:table-row>
        <table:table-row table:style-name="Table4.1">
          <table:table-cell table:style-name="Table4.A2" office:value-type="string">
            <text:p text:style-name="P65">function GetSSLBaseLibName: string;</text:p>
            <text:p text:style-name="P65"/>
            <text:p text:style-name="P65">procedure SetSSLBaseLibName(AValue: string);</text:p>
          </table:table-cell>
          <table:table-cell table:style-name="Table4.B2" office:value-type="string">
            <text:p text:style-name="P101">These are used to respectively get and set the basename for the SSL dynamic library. Defaults to 'libssl'.</text:p>
            <text:p text:style-name="P101"><text:span text:style-name="T9">Changing the base name will automatically unload the ssl and crypto libraries if currently loaded</text:span>.</text:p>
          </table:table-cell>
        </table:table-row>
        <table:table-row table:style-name="Table4.1">
          <table:table-cell table:style-name="Table4.A2" office:value-type="string">
            <text:p text:style-name="P65">function GetCryptoBaseLibName: string;</text:p>
            <text:p text:style-name="P65"/>
            <text:p text:style-name="P65">procedure SetCryptoBaseLibName(AValue: string);</text:p>
          </table:table-cell>
          <table:table-cell table:style-name="Table4.B2" office:value-type="string">
            <text:p text:style-name="P101">These are used to respectively get and set the basename for the crypto <text:s/>dynamic library. Defaults to 'libcrypto'.</text:p>
            <text:p text:style-name="P101"><text:span text:style-name="T9">Changing the base name will automatically unload the ssl and crypto libraries if currently loaded</text:span>.</text:p>
          </table:table-cell>
        </table:table-row>
        <text:soft-page-break/>
        <table:table-row table:style-name="Table4.1">
          <table:table-cell table:style-name="Table4.A2" office:value-type="string">
            <text:p text:style-name="P65">function GetAllowLegacyLibsFallback: boolean;</text:p>
            <text:p text:style-name="P65"/>
            <text:p text:style-name="P65">procedure SetAllowLegacyLibsFallback(AValue: boolean);</text:p>
          </table:table-cell>
          <table:table-cell table:style-name="Table4.B2" office:value-type="string">
            <text:p text:style-name="P101">These are used to respectively get and set the AllowLegacyLibsFallback flag. This is only used when running under Windows. </text:p>
            <text:p text:style-name="P101">If set and no OpenSSL libraries have been found when searching for them using the Base Library names and libversions, then the loader will attempt to load the OpenSSL libraries using the legacy library names 'libeay32' and 'ssleay32'.</text:p>
            <text:p text:style-name="P101">Defaults to 'false' <text:span text:style-name="T78">unless the legacy support headers are used when it defaults to 'true'.</text:span></text:p>
            <text:p text:style-name="P101"><text:span text:style-name="T9">Changing this flag will automatically unload the ssl and crypto libraries if currently loaded</text:span>.</text:p>
          </table:table-cell>
        </table:table-row>
        <table:table-row table:style-name="Table4.1">
          <table:table-cell table:style-name="Table4.A2" office:value-type="string">
            <text:p text:style-name="P65">function GetLibCryptoHandle: TLibHandle</text:p>
          </table:table-cell>
          <table:table-cell table:style-name="Table4.B2" office:value-type="string">
            <text:p text:style-name="P102">After a successful library load, this returns the value of the internal handle to libcrypto (internal use only recommended).</text:p>
            <text:p text:style-name="P44">Note. Library load attempted if the library has not been successfully loaded prior to the call.</text:p>
          </table:table-cell>
        </table:table-row>
        <table:table-row table:style-name="Table4.1">
          <table:table-cell table:style-name="Table4.A2" office:value-type="string">
            <text:p text:style-name="P65">function GetLibSSLHandle: TLibHandle;</text:p>
          </table:table-cell>
          <table:table-cell table:style-name="Table4.B2" office:value-type="string">
            <text:p text:style-name="P70"><text:span text:style-name="T63">After a successful library load, this returns the value of the internal handle to </text:span><text:span text:style-name="T33">libssl</text:span><text:span text:style-name="T63"> (internal use only recommended).</text:span></text:p>
            <text:p text:style-name="P44">Note. Library load attempted if the library has not been successfully loaded prior to the call.</text:p>
          </table:table-cell>
        </table:table-row>
        <table:table-row table:style-name="Table4.1">
          <table:table-cell table:style-name="Table4.A2" office:value-type="string">
            <text:p text:style-name="P65">function GetLibCryptoFilePath: string</text:p>
          </table:table-cell>
          <table:table-cell table:style-name="Table4.B2" office:value-type="string">
            <text:p text:style-name="P102">After a successful library load, this returns the path to the loaded libcrypto library. (note: may be empty if default library loaded).</text:p>
          </table:table-cell>
        </table:table-row>
        <table:table-row table:style-name="Table4.1">
          <table:table-cell table:style-name="Table4.A2" office:value-type="string">
            <text:p text:style-name="P65">function GetLibSSLFilePath: string</text:p>
          </table:table-cell>
          <table:table-cell table:style-name="Table4.B9" office:value-type="string">
            <text:p text:style-name="P70"><text:span text:style-name="T63">After a successful library load, this returns the path to the loaded </text:span><text:span text:style-name="T33">libssl</text:span><text:span text:style-name="T63"> library. (note: may be empty if default library loaded).</text:span></text:p>
          </table:table-cell>
        </table:table-row>
        <table:table-row table:style-name="Table4.1">
          <table:table-cell table:style-name="Table4.A2" office:value-type="string">
            <text:p text:style-name="P65">function Load: Boolean;</text:p>
          </table:table-cell>
          <table:table-cell table:style-name="Table4.B2" office:value-type="string">
            <text:p text:style-name="P102">Explicitly loads the library if not already loaded and returns “true” on successful load.</text:p>
            <text:p text:style-name="P36">Note. This is normally invoked automatically when the first API call is called but may be called explicitly to force library load (e.g. on program startup).</text:p>
          </table:table-cell>
        </table:table-row>
        <table:table-row table:style-name="Table4.1">
          <table:table-cell table:style-name="Table4.A2" office:value-type="string">
            <text:p text:style-name="P65">procedure Unload;</text:p>
          </table:table-cell>
          <table:table-cell table:style-name="Table4.B2" office:value-type="string">
            <text:p text:style-name="P102">Explicitly unloads the library if current loaded.</text:p>
          </table:table-cell>
        </table:table-row>
        <text:soft-page-break/>
        <table:table-row table:style-name="Table4.1">
          <table:table-cell table:style-name="Table4.A2" office:value-type="string">
            <text:p text:style-name="P65">function IsLoaded: boolean</text:p>
          </table:table-cell>
          <table:table-cell table:style-name="Table4.B12" office:value-type="string">
            <text:p text:style-name="P103">Returns true if the OpenSSL library has been successfully loaded.</text:p>
          </table:table-cell>
        </table:table-row>
      </table:table>
      <text:p text:style-name="P51"/>
      <text:h text:style-name="P147" text:outline-level="3"><text:bookmark-start text:name="__RefHeading___Toc2477_935133783"/>Detecting the Header Version<text:bookmark-end text:name="__RefHeading___Toc2477_935133783"/></text:h>
      <text:p text:style-name="P76">Separate to determining the OpenSSL release number for the loaded library, it is also possible to determine the OpenSSL release from which the headers where generated. This is enabled by including the “openssl_opensslv.inc” header in the interface section of the OpenSSLAPI unit. </text:p>
      <text:p text:style-name="P76">For example, the constant OPENSSL_VERSION_STR will then return the OpenSSL header version (e.g. '3.0.20'). Other similar constants are also available.</text:p>
      <text:h text:style-name="P140" text:outline-level="2"><text:bookmark-start text:name="__RefHeading___Toc3375_2803303036"/>Windows Trusted Certificate Store Support<text:bookmark-end text:name="__RefHeading___Toc3375_2803303036"/></text:h>
      <text:p text:style-name="P115">So that OpenSSL can verify certificates, access is required to a list of trusted root certificates which can be loaded into its internal certificate store prior to certificate validation.</text:p>
      <text:p text:style-name="P115">When OpenSSL is built, a default location for this list is configured into the software and any list of certificates found there is, at run time, loaded when the user invokes the API function:</text:p>
      <text:p text:style-name="P115">SSL_CTX_set_default_verify_paths</text:p>
      <text:p text:style-name="P116"><text:span text:style-name="T93">Under Linux</text:span>, <text:span text:style-name="T88">a suitable list of </text:span>trusted root certificates <text:span text:style-name="T88">is distributed with the Linux distro and located in a well known location (e.g . on Debian derived distribution</text:span><text:span text:style-name="T95">s</text:span><text:span text:style-name="T88"> this is /etc/ssl/certs). It is sufficient for the API user to invoke the above function call in order to enable certificate verification.</text:span></text:p>
      <text:p text:style-name="P117"><text:span text:style-name="T93">Under Windows</text:span>, a <text:span text:style-name="T87">list of trusted root certificates </text:span>is similarly distributed with the Operating System but rather than locate this i<text:span text:style-name="T95">n</text:span> some well known directory, the list is secured in a small secure database. </text:p>
      <text:p text:style-name="P119">It is possible for a list of trusted certificates to be distributed with an application or OpenSSL itself and placed in the configured well known location (and then loaded us<text:span text:style-name="T90">i</text:span>ng the <text:span text:style-name="T87">SSL_CTX_set_default_verify_paths</text:span> API call). However, this is rarely done and, it may be argued, that the Windows secure database should, <text:span text:style-name="T90">in most cases,</text:span> be the preferred up-to-date source of trusted root certificates, given that it is maintained by Windows Update.</text:p>
      <text:p text:style-name="P117">In order to support use of the Windows trusted root certificate store, the PascalAPI4OpenSSL comes with an additional unit “openssl_win509.pas”. This unit contains the functionality needed to load OpenSSL's internal certificate store from the <text:s/>Windows trusted root certificate store.</text:p>
      <text:p text:style-name="P117">When compiled under Windows, this unit provides the following additional API calls:</text:p>
      <text:p text:style-name="Pascal">function HasWindowsCertStore: boolean;</text:p>
      <text:p text:style-name="Pascal">function LoadWindowsCertStore(ctx:PSSL_CTX): integer;</text:p>
      <text:p text:style-name="P118">The HasWindowsCertStore returns true if the Windows trusted root certificate store is available and false otherwise.</text:p>
      <text:p text:style-name="P118">The LoadWindowsCertStore function loads OpenSSL's internal certificate store from the Windows trusted root certificate store and returns the number of certificates loaded.</text:p>
      <text:h text:style-name="P148" text:outline-level="3"><text:bookmark-start text:name="__RefHeading___Toc3377_2803303036"/><text:soft-page-break/>Using the openssl_winx509 unit<text:bookmark-end text:name="__RefHeading___Toc3377_2803303036"/></text:h>
      <text:p text:style-name="P121">The <text:span text:style-name="T88">LoadWindowsCertStore </text:span>function should be called soon after a new SSL context has been created, <text:span text:style-name="T95">and for each new SSL context</text:span> e.g.</text:p>
      <text:p text:style-name="P120">uses openssl_types, openssl_x509;</text:p>
      <text:p text:style-name="P120"/>
      <text:p text:style-name="P120">var ctx: PSSL_CTX;</text:p>
      <text:p text:style-name="P120"/>
      <text:p text:style-name="P120">…</text:p>
      <text:p text:style-name="P120"><text:s text:c="2"/>ctx := SSL_CTX_new(&lt;SSL Method&gt;);</text:p>
      <text:p text:style-name="P120"/>
      <text:p text:style-name="P120">…</text:p>
      <text:p text:style-name="P120">{$IF declared(HasWindowsCertStore)}</text:p>
      <text:p text:style-name="P120"><text:s text:c="2"/>if HasWindowsCertStore then</text:p>
      <text:p text:style-name="P120"><text:s text:c="4"/>LoadWindowsCertStore(ctx);</text:p>
      <text:p text:style-name="P120">{$ELSE}</text:p>
      <text:p text:style-name="P120"><text:s text:c="2"/>SSL_CTX_set_default_verify_paths(ctx);</text:p>
      <text:p text:style-name="P120">{$IFEND}</text:p>
      <text:p text:style-name="P122">The openssl_x509 is safe to include for all target platforms. It is an empty unit on non-Windows platforms.</text:p>
      <text:p text:style-name="P122">The conditional code ensures that the openssl_x509 functions are only called when available. Hence the above should be valid for all platforms. Typically, on non-Windows platforms, <text:s/>SSL_CTX_set_default_verify_paths should be called instead in order to load <text:span text:style-name="T88">OpenSSL's internal certificate store </text:span>from the default location.</text:p>
      <text:p text:style-name="P122">The action taken if HasWindowsCertStore returns false is application dependent. For example, you may decide to raise an exception or to try the default location.</text:p>
      <text:h text:style-name="P149" text:outline-level="3"><text:bookmark-start text:name="__RefHeading___Toc3379_2803303036"/>openssl_winx509 unit <text:span text:style-name="T89">Link strategies</text:span><text:bookmark-end text:name="__RefHeading___Toc3379_2803303036"/></text:h>
      <text:p text:style-name="P123">The Windows trusted certificate store is access using the 'crypt32.dll' link library.</text:p>
      <text:p text:style-name="P123">This is loaded dynamically at OpenSSL library load time if the <text:span text:style-name="T17">Dynamic Library Load </text:span><text:span text:style-name="T16">link strategy is in use. Otherwise, linking is performed at program load (i.e. </text:span><text:span text:style-name="T17">Compile time linkage to a shared </text:span><text:span text:style-name="T16">library).</text:span></text:p>
      <text:p text:style-name="P47"/>
      <text:h text:style-name="Heading_20_1" text:outline-level="1"><text:bookmark-start text:name="__RefHeading___Toc2676_1056010645"/><text:line-break/><text:span text:style-name="T41">Library Linking Strategies</text:span><text:bookmark-end text:name="__RefHeading___Toc2676_1056010645"/></text:h>
      <text:p text:style-name="P59"><text:span text:style-name="T42">In the Indy component library, the default linking strategy for OpenSSL was to load the </text:span><text:span text:style-name="T51">OpenSSL </text:span><text:span text:style-name="T42">librar</text:span><text:span text:style-name="T51">ies</text:span><text:span text:style-name="T42"> dynamically at runtime and to </text:span><text:span text:style-name="T34">resolve</text:span><text:span text:style-name="T42"> each API call entry point using the 'GetProcAddress' function call </text:span><text:span text:style-name="T95">and immediately afterwards</text:span><text:span text:style-name="T42">. The returned address was then assigned to a function variable with an appropriate type.</text:span></text:p>
      <text:p text:style-name="P59"><text:span text:style-name="T42">The downsides of this “legacy” approach </text:span><text:span text:style-name="T25">are</text:span><text:span text:style-name="T42"> that:</text:span></text:p>
      <text:list text:style-name="L9">
        <text:list-item>
          <text:p text:style-name="P157">It may take a noticeable time to load all API call addresses including many that are never used.</text:p>
        </text:list-item>
        <text:list-item>
          <text:p text:style-name="P157">An error is typically declared i<text:span text:style-name="T51">f</text:span> an API call fails to be loaded even when the call is never used by the user program.</text:p>
        </text:list-item>
        <text:list-item>
          <text:p text:style-name="P157">There is no overall strategy for managing multiple versions of the OpenSSL library with different sets of API calls.</text:p>
        </text:list-item>
        <text:list-item>
          <text:p text:style-name="P157">Static linking is possible but only by replacing the dynamic loading units with a static linkage unit and using conditional compilation in user code to manage the differences.</text:p>
        </text:list-item>
      </text:list>
      <text:p text:style-name="P56">The<text:span text:style-name="T79">se</text:span> <text:span text:style-name="T79">headers</text:span> <text:span text:style-name="T79">are</text:span> intended to avoid these problems, <text:span text:style-name="T43">and use conditional compilation to support </text:span><text:span text:style-name="T79">three separate</text:span><text:span text:style-name="T43"> linking strateg</text:span><text:span text:style-name="T95">ies</text:span><text:span text:style-name="T43"> in the same unit </text:span><text:span text:style-name="T95">and </text:span><text:span text:style-name="T43">transparently to the user program. </text:span><text:span text:style-name="T47">Both static and dynamic linking are supported. </text:span></text:p>
      <text:p text:style-name="P39"><text:span text:style-name="T86">Note. </text:span>With static linking, the OpenSSL library must be explicitly initialised before use (see <text:bookmark-ref text:reference-format="number" text:ref-name="__RefHeading___Toc2712_1056010645">2.3.1</text:bookmark-ref>). With dynamically loading the library is automatically loaded and initialised on the first API call.</text:p>
      <text:h text:style-name="P141" text:outline-level="2"><text:bookmark-start text:name="__RefHeading___Toc2678_1056010645"/>Static Linking<text:bookmark-end text:name="__RefHeading___Toc2678_1056010645"/></text:h>
      <text:p text:style-name="P56">Two flavours of static linking are supported:</text:p>
      <text:list text:style-name="L10">
        <text:list-item>
          <text:p text:style-name="P158">Linking to a static library (typically with a “<text:span text:style-name="T9">.a”</text:span> suffix).</text:p>
        </text:list-item>
        <text:list-item>
          <text:p text:style-name="P159"><text:soft-page-break/><text:span text:style-name="T42">Linking to a shared library (</text:span><text:span text:style-name="T10">.so</text:span><text:span text:style-name="T42"> or </text:span><text:span text:style-name="T10">.dll</text:span><text:span text:style-name="T42">) </text:span><text:span text:style-name="T34">with call API resolution</text:span><text:span text:style-name="T42"> by the Operating System's program loader </text:span><text:span text:style-name="T66">at program load time</text:span><text:span text:style-name="T42">.</text:span></text:p>
        </text:list-item>
      </text:list>
      <text:p text:style-name="P63">With static linking, a specific OpenSSL version has to be supported, <text:span text:style-name="T79">as determined by the OpenSSL release used to generate the selected headers</text:span>. Only the API calls present in <text:span text:style-name="T79">this version</text:span> can be declared as external function/procedure calls.</text:p>
      <text:p text:style-name="P34">Note. This restriction is a consequence of the linking/loading of the program failing if not all declared API calls are present in the external library.</text:p>
      <text:h text:style-name="Heading_20_3" text:outline-level="3"><text:bookmark-start text:name="__RefHeading___Toc2680_1056010645"/>Linking to a static library<text:bookmark-end text:name="__RefHeading___Toc2680_1056010645"/></text:h>
      <text:p text:style-name="P57"><text:span text:style-name="T79">Internally and i</text:span>n order to achieve this:</text:p>
      <text:list xml:id="list2782480357" text:style-name="L11">
        <text:list-item>
          <text:p text:style-name="P160"><text:span text:style-name="T43">each API call </text:span><text:span text:style-name="T86">is</text:span><text:span text:style-name="T43"> formatted as an external declaration </text:span><text:span text:style-name="T26">with an empty library name.</text:span></text:p>
        </text:list-item>
        <text:list-item>
          <text:p text:style-name="P160"><text:span text:style-name="T26">FPC: a {$LINKLIB …} compiler directive </text:span><text:span text:style-name="T37">is</text:span><text:span text:style-name="T26"> provided for each</text:span><text:span text:style-name="T43"> external library to which the compiled unit is to be linked (e.g. {$LINKLIB ssl.a} {$LINKLIB crypto.a}). </text:span></text:p>
        </text:list-item>
        <text:list-item>
          <text:p text:style-name="P162">Delphi: a {$LINK …} compiler directive <text:span text:style-name="T86">will need to be</text:span><text:span text:style-name="T24"> provided for each</text:span> external object file to which <text:s/>the compiled unit is to be linked. <text:span text:style-name="T96">The object files should follow the expected naming convention ( i.e. &lt;unitname&gt;.obj).</text:span></text:p>
        </text:list-item>
      </text:list>
      <text:list text:style-name="L12">
        <text:list-item>
          <text:p text:style-name="P180">For 32-bit Windows, the named file must be an Intel relocatable object file (OMF86), or 32-bit COFF format object file. </text:p>
        </text:list-item>
        <text:list-item>
          <text:p text:style-name="P179">For 64-bit Windows, ELF objects generated by bcc64, and COFF objects by Visual C++, can be recognized. </text:p>
        </text:list-item>
      </text:list>
      <text:h text:style-name="Heading_20_3" text:outline-level="3"><text:bookmark-start text:name="__RefHeading___Toc2682_1056010645"/>Linking to a shared library<text:bookmark-end text:name="__RefHeading___Toc2682_1056010645"/></text:h>
      <text:p text:style-name="P58"><text:span text:style-name="T79">Internally, and i</text:span>n order to achieve this:</text:p>
      <text:list text:continue-list="list2782480357" text:style-name="L11">
        <text:list-item>
          <text:p text:style-name="P161"><text:span text:style-name="T43">each API call must be formatted as an external declaration </text:span><text:span text:style-name="T26">with </text:span><text:span text:style-name="T27">the name of the shared</text:span><text:span text:style-name="T26"> library </text:span><text:span text:style-name="T27">in which the API call is located.</text:span></text:p>
        </text:list-item>
      </text:list>
      <text:h text:style-name="P150" text:outline-level="3"><text:bookmark-start text:name="__RefHeading___Toc2684_1056010645"/>Implementation<text:bookmark-end text:name="__RefHeading___Toc2684_1056010645"/></text:h>
      <text:p text:style-name="P49"><text:span text:style-name="T11">h2pas</text:span><text:span text:style-name="T14">pp</text:span><text:span text:style-name="T66"> </text:span><text:span text:style-name="T34">generates a</text:span><text:span text:style-name="T45"> conditional compilation section in each output unit's interface section </text:span><text:span text:style-name="T79">for static linking </text:span><text:span text:style-name="T28">providing</text:span><text:span text:style-name="T45">:</text:span></text:p>
      <text:list text:style-name="L13">
        <text:list-item>
          <text:p text:style-name="P163">Each API call as an external declaration with a named constant used for the library name.</text:p>
        </text:list-item>
      </text:list>
      <text:p text:style-name="P90">Depending on the static linking model this constant is either empty (static linking) or is set to the library name (shared library linking).</text:p>
      <text:p text:style-name="P62"><text:span text:style-name="T79">T</text:span><text:span text:style-name="T43">he OpenSSLAPI </text:span><text:span text:style-name="T34">unit (include file)</text:span><text:span text:style-name="T43"> </text:span><text:span text:style-name="T45">defines common types used by the API calls. It also </text:span><text:span text:style-name="T43">includes:</text:span></text:p>
      <text:list text:style-name="L14">
        <text:list-item>
          <text:p text:style-name="P164"><text:span text:style-name="T96">FPC only: </text:span><text:span text:style-name="T43">a {$LINKLIB …} directive for standard OpenSSL libraries </text:span><text:span text:style-name="T44">(e.g. those generated by gcc). </text:span></text:p>
        </text:list-item>
        <text:list-item>
          <text:p text:style-name="P164"><text:span text:style-name="T45">The definitions of the named constants used for library names. These constants are empty strings </text:span><text:span text:style-name="T34">when</text:span><text:span text:style-name="T45"> linking to a static library, while </text:span><text:span text:style-name="T34">their value is</text:span><text:span text:style-name="T45"> set to the library names </text:span><text:span text:style-name="T34">when</text:span><text:span text:style-name="T45"> linking to a shared library.</text:span></text:p>
        </text:list-item>
      </text:list>
      <text:p text:style-name="P90"><text:soft-page-break/>The user of the headers need only set the appropriate symbol for the required link model. <text:span text:style-name="T86">The above is for information only.</text:span></text:p>
      <text:p text:style-name="P48">Note. Unit file template includes a conditional section for Delphi and static linking only that includes a $LINK directive for the corresponding object file.</text:p>
      <text:h text:style-name="P142" text:outline-level="2"><text:bookmark-start text:name="__RefHeading___Toc2686_1056010645"/><text:bookmark-start text:name="__RefNumPara__1724_1580953688"/>Dynamic Linking<text:bookmark-end text:name="__RefHeading___Toc2686_1056010645"/><text:bookmark-end text:name="__RefNumPara__1724_1580953688"/></text:h>
      <text:p text:style-name="P91"><text:span text:style-name="T11">h2pas</text:span><text:span text:style-name="T14">pp</text:span><text:span text:style-name="T66"> </text:span><text:span text:style-name="T34">generates a</text:span><text:span text:style-name="T45"> conditional compilation section in each output unit's interface section </text:span><text:span text:style-name="T79">for dynamic linking and as the alternative to static linking.</text:span></text:p>
      <text:p text:style-name="P113"><text:span text:style-name="T79">The </text:span><text:span text:style-name="T48">dynamic linking </text:span><text:span text:style-name="T79">model uses </text:span><text:span text:style-name="T47">“</text:span><text:span text:style-name="T49">Just in Time Linking (JIT)”: At compile time, each API call is set to a </text:span><text:span text:style-name="T34">generated</text:span><text:span text:style-name="T49"> loader function specific to the API call. The first time a user calls the API call, the </text:span><text:span text:style-name="T86">loader function resolves the</text:span><text:span text:style-name="T49"> API call from the </text:span><text:span text:style-name="T86">link </text:span><text:span text:style-name="T49">library and replaces the customised loader function address </text:span><text:span text:style-name="T66">in the API Call function variable </text:span><text:span text:style-name="T86">with the loaded function address</text:span><text:span text:style-name="T49">. The API call is then invoked. </text:span></text:p>
      <text:p text:style-name="P113"><text:span text:style-name="T49">If </text:span><text:span text:style-name="T48">the API call is not present in the library, </text:span><text:span text:style-name="T79">then</text:span><text:span text:style-name="T48"> </text:span><text:span text:style-name="T49">an </text:span><text:span text:style-name="T33">EOpenSSLAPIFunctionNotPresent </text:span><text:span text:style-name="T49">exception is raised. </text:span></text:p>
      <text:p text:style-name="P90">Note that when legacy support is provided <text:span text:style-name="T96">and</text:span> when <text:span text:style-name="T48">the API call is not present in the </text:span><text:span text:style-name="T86">link</text:span><text:span text:style-name="T48"> library </text:span>then a legacy support function is called instead, if it has been declared. Legacy support functions are declared in a separate include file only included when legacy support is enabled.</text:p>
      <text:p text:style-name="P40">Note. In the h2pas<text:span text:style-name="T96">pp</text:span> configuration file, it is <text:span text:style-name="T86">also </text:span>possible to label some API class as “Allow Nil”. In this case, the var declarations is initialised to 'nil'. The purpose of this is to allow the presence of the API call to be determined by checking for a non-nil value rather than having to catch an exception <text:span text:style-name="T98">See Appendix B)</text:span>.</text:p>
      <text:h text:style-name="P151" text:outline-level="3"><text:bookmark-start text:name="__RefHeading___Toc2688_1056010645"/>Implementation<text:bookmark-end text:name="__RefHeading___Toc2688_1056010645"/></text:h>
      <text:p text:style-name="P60"><text:span text:style-name="T79">In</text:span><text:span text:style-name="T45"> conditional compilation section </text:span><text:span text:style-name="T79">for dynamic loading </text:span><text:span text:style-name="T45">in each output unit's interface section:</text:span></text:p>
      <text:list text:style-name="L15">
        <text:list-item>
          <text:p text:style-name="P165"><text:span text:style-name="T12">Var</text:span><text:span text:style-name="T46"> declarations </text:span><text:span text:style-name="T79">are generated </text:span><text:span text:style-name="T46">for each API call </text:span><text:span text:style-name="T79">and </text:span><text:span text:style-name="T49">each variable is initialis<text:tab/>ed to the address of the </text:span><text:span text:style-name="T52">API Call</text:span><text:span text:style-name="T49">'s </text:span><text:span text:style-name="T67">generated </text:span><text:span text:style-name="T49">loader function </text:span><text:span text:style-name="T80">(or nil </text:span><text:span text:style-name="T86">f</text:span><text:span text:style-name="T96">o</text:span><text:span text:style-name="T86">r “allow nil” functions - see</text:span><text:span text:style-name="T80"> above)</text:span><text:span text:style-name="T49">.</text:span></text:p>
        </text:list-item>
      </text:list>
      <text:p text:style-name="P90">In the implementation section:</text:p>
      <text:list text:style-name="L16">
        <text:list-item>
          <text:p text:style-name="P166"><text:span text:style-name="T79">the</text:span><text:span text:style-name="T49"> loader function </text:span><text:span text:style-name="T67">body</text:span><text:span text:style-name="T49"> for each API call is </text:span><text:span text:style-name="T35">generated</text:span><text:span text:style-name="T49">.</text:span></text:p>
        </text:list-item>
        <text:list-item>
          <text:p text:style-name="P167"><text:span text:style-name="T49">A</text:span><text:span text:style-name="T46"> “load” function is </text:span><text:span text:style-name="T80">declared</text:span><text:span text:style-name="T46"> which attempts to use “GetProcAddress” to load each API call in turn </text:span><text:span text:style-name="T80">for each “allow nil” API function. This ensures that the correct status of the API call is known as soon as the library has been loaded.</text:span></text:p>
        </text:list-item>
        <text:list-item>
          <text:p text:style-name="P168">An “unload” function is declared which resets each API function var to its initial value.</text:p>
        </text:list-item>
        <text:list-item>
          <text:p text:style-name="P169">Load Function Registration:</text:p>
        </text:list-item>
      </text:list>
      <text:p text:style-name="P50">At unit initialisation time, <text:span text:style-name="T80">both </text:span>the Load <text:span text:style-name="T80">and Unload </text:span>function<text:span text:style-name="T80">s</text:span> <text:span text:style-name="T80">are</text:span> registered with the library loade<text:span text:style-name="T67">r (in the OpenSSLAPI unit)</text:span> by a call to the registration function “Register_SSLLoader”.</text:p>
      <text:h text:style-name="P143" text:outline-level="2"><text:bookmark-start text:name="__RefHeading___Toc2690_1056010645"/><text:soft-page-break/>The OpenSSLAPI Unit<text:bookmark-end text:name="__RefHeading___Toc2690_1056010645"/></text:h>
      <text:p text:style-name="P61"><text:span text:style-name="T80">The unit</text:span> “OpenSSLAPI.pas” includes the library loader. Th<text:span text:style-name="T81">e loader</text:span> is also subject to conditional compilation and only included when dynamic linking is used.</text:p>
      <text:p text:style-name="P73"><text:span text:style-name="T50">The library loader loads both OpenSSL libraries (libssl and libcrypto) and then calls </text:span><text:span text:style-name="T29">each</text:span><text:span text:style-name="T50"> registered load function in turn.</text:span></text:p>
      <text:p text:style-name="P61">The library loader <text:span text:style-name="T80">does not have to</text:span> be explicitly called <text:span text:style-name="T80">for the dynamic linking model but should be called before any API function vars are tested for a non-nil value if this feature is used </text:span><text:span text:style-name="T81">(see </text:span><text:span text:style-name="T81"><text:bookmark-ref text:reference-format="number" text:ref-name="__RefHeading___Toc2714_1056010645">2.3.2</text:bookmark-ref></text:span><text:span text:style-name="T81">)</text:span></text:p>
      <text:p text:style-name="Text_20_body"/>
      <text:h text:style-name="Heading_20_1" text:outline-level="1"><text:bookmark-start text:name="__RefNumPara__2220_4246599899"/><text:bookmark-start text:name="__RefHeading___Toc533_3729669304"/><text:line-break/><text:span text:style-name="T82">Notes on the OpenSSLh2pas.sh Script</text:span><text:bookmark-end text:name="__RefNumPara__2220_4246599899"/><text:bookmark-end text:name="__RefHeading___Toc533_3729669304"/></text:h>
      <text:p text:style-name="P92">This shell script may be found in the “gen” folder and is used to generate each set of headers for a given OpenSSL release. The script is driven by a configuration file also in the “gen” folder with a separate configuration file for each release.</text:p>
      <text:p text:style-name="P92">The script is called with options:</text:p>
      <text:p text:style-name="Pascal">./OpenSSLh2pas.sh <text:span text:style-name="T82">[-h] </text:span>[-o &lt;<text:span text:style-name="T82">output </text:span>director<text:span text:style-name="T82">y</text:span>&gt;] [-d] [-C] Configureation file<text:span text:style-name="T97">na</text:span>me&gt;] &lt;source dir/filename&gt;</text:p>
      <text:p text:style-name="P92">The options are:</text:p>
      <table:table table:name="Table1" table:style-name="Table1">
        <table:table-column table:style-name="Table1.A"/>
        <table:table-column table:style-name="Table1.B"/>
        <table:table-row>
          <table:table-cell table:style-name="Table1.A1" office:value-type="string">
            <text:p text:style-name="Table_20_Contents">-<text:span text:style-name="T82">o </text:span></text:p>
          </table:table-cell>
          <table:table-cell table:style-name="Table1.B1" office:value-type="string">
            <text:p text:style-name="Table_20_Contents">Header output directory <text:span text:style-name="T82">(default set in configuration file)</text:span></text:p>
          </table:table-cell>
        </table:table-row>
        <table:table-row table:style-name="Table1.2">
          <table:table-cell table:style-name="Table1.A2" office:value-type="string">
            <text:p text:style-name="Table_20_Contents">-<text:span text:style-name="T97">h</text:span></text:p>
          </table:table-cell>
          <table:table-cell table:style-name="Table1.B2" office:value-type="string">
            <text:p text:style-name="P93">Prints out option summary</text:p>
          </table:table-cell>
        </table:table-row>
        <table:table-row table:style-name="Table1.2">
          <table:table-cell table:style-name="Table1.A2" office:value-type="string">
            <text:p text:style-name="Table_20_Contents">-<text:span text:style-name="T82">d </text:span></text:p>
          </table:table-cell>
          <table:table-cell table:style-name="Table1.B2" office:value-type="string">
            <text:p text:style-name="P93">Debug mode</text:p>
          </table:table-cell>
        </table:table-row>
        <table:table-row table:style-name="Table1.2">
          <table:table-cell table:style-name="Table1.A2" office:value-type="string">
            <text:p text:style-name="P93">-C</text:p>
          </table:table-cell>
          <table:table-cell table:style-name="Table1.B2" office:value-type="string">
            <text:p text:style-name="P93">The name of the configuration file (defaults to “openssl.cfg” in the current directory).</text:p>
          </table:table-cell>
        </table:table-row>
        <table:table-row table:style-name="Table1.2">
          <table:table-cell table:style-name="Table1.A5" office:value-type="string">
            <text:p text:style-name="Text_20_body">&lt;source dir/filename&gt;</text:p>
          </table:table-cell>
          <table:table-cell table:style-name="Table1.B2" office:value-type="string">
            <text:p text:style-name="P93">Source filename (.h extension assumed) or source directory for multiple files</text:p>
          </table:table-cell>
        </table:table-row>
      </table:table>
      <text:p text:style-name="P92"/>
      <text:h text:style-name="P144" text:outline-level="2"><text:bookmark-start text:name="__RefHeading___Toc2479_935133783"/><text:soft-page-break/>Configuration File<text:bookmark-end text:name="__RefHeading___Toc2479_935133783"/></text:h>
      <text:p text:style-name="P74">This file is included in the script at run time and is used to set variables that control the operation of the script. For example, the openssl3.0.cfg configuration file is used to generate the 3.0.x headers and has the content:</text:p>
      <text:p text:style-name="Pascal">DEFAULTMAJORMINOR="3.0"</text:p>
      <text:p text:style-name="Pascal">DEFAULTVERNUM="3.0.20"</text:p>
      <text:p text:style-name="Pascal">DEFAULTPATCHLEVEL=</text:p>
      <text:p text:style-name="Pascal">LIBDIR="${DEFAULTVERNUM}${DEFAULTPATCHLEVEL}"</text:p>
      <text:p text:style-name="Pascal">DEFAULTOPENSSL="$HOME/SoftwareDev/external/openssl/openssl-${LIBDIR}"</text:p>
      <text:p text:style-name="Pascal">DEFAULTHDRDIR="${DEFAULTOPENSSL}/include/openssl"</text:p>
      <text:p text:style-name="Pascal">DEFAULTOUTPUTROOT=../headers</text:p>
      <text:p text:style-name="Pascal">VERHDR=opensslv.h</text:p>
      <text:p text:style-name="Pascal">H2PAS=h2pas<text:span text:style-name="T97">pp</text:span></text:p>
      <text:p text:style-name="Pascal">ROOTDIR=`dirname $0`</text:p>
      <text:p text:style-name="Pascal">H2PASCONFIG="${ROOTDIR}/data/${DEFAULTMAJORMINOR}/h2pasoptions.cfg"</text:p>
      <text:p text:style-name="Pascal">IGNOREINCLUDEFILES=spthread</text:p>
      <text:p text:style-name="Pascal">IGNOREHEADERS=asn1_mac.h</text:p>
      <text:p text:style-name="Pascal">OTHERFILES="${ROOTDIR}/data/OtherFiles"</text:p>
      <text:p text:style-name="Pascal">CPATCHDIR="${ROOTDIR}/data/${DEFAULTMAJORMINOR}/patches/${LIBDIR}"</text:p>
      <text:p text:style-name="Pascal">PPATCHDIR="${CPATCHDIR}"</text:p>
      <text:p text:style-name="Pascal">CONFIGDIR="${ROOTDIR}/data"</text:p>
      <text:list text:style-name="L17">
        <text:list-item>
          <text:p text:style-name="P182">DEFAULTMAJORMINOR <text:span text:style-name="T83">and DEFAULTVERNUM determine the release and are different for each release. </text:span></text:p>
        </text:list-item>
        <text:list-item>
          <text:p text:style-name="P183">DEFAULTPATCHLEVEL is used when the OpenSSL library has a patch level. For example he latest OpenSSL 1.0.2 has a patch level of 'u'.</text:p>
        </text:list-item>
        <text:list-item>
          <text:p text:style-name="P181">DEFAULTOPENSSL <text:span text:style-name="T83">gives the source directory for the OpenSSL release. This is dependent on the directory layout on the system used to generate the headers and will to be changed to whatever location is used on your system.</text:span></text:p>
        </text:list-item>
      </text:list>
      <text:p text:style-name="P75">The remaining options are rarely changed.</text:p>
      <text:p text:style-name="P109"><text:bookmark-start text:name="__RefHeading___Toc2481_935133783"/>Appendix A - List of Modified Constant Names<text:bookmark-end text:name="__RefHeading___Toc2481_935133783"/></text:p>
      <text:p text:style-name="P110">Unlike 'C', Pascal is a case-insensitive programming language. In consequence, there are cases where two identifiers in the 'C' headers differ only in case and which while these are unique in 'C', these are not unique identifiers in Pascal. In order to handle this case, <text:span text:style-name="T9">h2pas</text:span><text:span text:style-name="T15">pp</text:span><text:span text:style-name="T16"> adds an extra underscore to one of the identifiers - typically a constant where a type or function name and a constant name differ only in case. The following in a list of unit and identifiers to which an underscore has been added in the 4.0.0 headers.</text:span></text:p>
      <text:p text:style-name="P111">openssl_aes.pas: <text:s/>AES_ENCRYPT_ = 1;</text:p>
      <text:p text:style-name="P111">openssl_aes.pas: <text:s/>AES_DECRYPT_ = 0;</text:p>
      <text:p text:style-name="P112">openssl_bio.pas: <text:s/>BIO_CTRL_PENDING_ = 10;</text:p>
      <text:p text:style-name="P112">openssl_bio.pas: <text:s/>BIO_CTRL_WPENDING_ = 13;</text:p>
      <text:p text:style-name="P112">openssl_blowfish.pas: <text:s/>BF_ENCRYPT_ = 1;</text:p>
      <text:p text:style-name="P112">openssl_blowfish.pas: <text:s/>BF_DECRYPT_ = 0;</text:p>
      <text:p text:style-name="P112">openssl_camellia.pas: <text:s/>CAMELLIA_ENCRYPT_ = 1;</text:p>
      <text:p text:style-name="P112">openssl_camellia.pas: <text:s/>CAMELLIA_DECRYPT_ = 0;</text:p>
      <text:p text:style-name="P112">openssl_cast.pas: <text:s/>CAST_ENCRYPT_ = 1;</text:p>
      <text:p text:style-name="P112">openssl_cast.pas: <text:s/>CAST_DECRYPT_ = 0;</text:p>
      <text:p text:style-name="P112">openssl_cms.pas: <text:s/>CMS_STREAM_ = $1000;</text:p>
      <text:p text:style-name="P112">openssl_core_dispatch.pas: <text:s/>OSSL_FUNC_CORE_GETTABLE_PARAMS_ = 1;</text:p>
      <text:p text:style-name="P112">openssl_core_dispatch.pas: <text:s/>OSSL_FUNC_CORE_GET_PARAMS_ = 2;</text:p>
      <text:p text:style-name="P112">openssl_core_dispatch.pas: <text:s/>OSSL_FUNC_CORE_THREAD_START_ = 3;</text:p>
      <text:p text:style-name="P112">openssl_core_dispatch.pas: <text:s/>OSSL_FUNC_CORE_GET_LIBCTX_ = 4;</text:p>
      <text:p text:style-name="P112">openssl_core_dispatch.pas: <text:s/>OSSL_FUNC_CORE_NEW_ERROR_ = 5;</text:p>
      <text:p text:style-name="P112">openssl_core_dispatch.pas: <text:s/>OSSL_FUNC_CORE_SET_ERROR_DEBUG_ = 6;</text:p>
      <text:p text:style-name="P112">openssl_core_dispatch.pas: <text:s/>OSSL_FUNC_CORE_VSET_ERROR_ = 7;</text:p>
      <text:p text:style-name="P112">openssl_core_dispatch.pas: <text:s/>OSSL_FUNC_CORE_SET_ERROR_MARK_ = 8;</text:p>
      <text:p text:style-name="P112">openssl_core_dispatch.pas: <text:s/>OSSL_FUNC_CORE_CLEAR_LAST_ERROR_MARK_ = 9;</text:p>
      <text:p text:style-name="P112">openssl_core_dispatch.pas: <text:s/>OSSL_FUNC_CORE_POP_ERROR_TO_MARK_ = 10;</text:p>
      <text:p text:style-name="P112">openssl_core_dispatch.pas: <text:s/>OSSL_FUNC_CORE_OBJ_ADD_SIGID_ = 11;</text:p>
      <text:p text:style-name="P112">openssl_core_dispatch.pas: <text:s/>OSSL_FUNC_CORE_OBJ_CREATE_ = 12;</text:p>
      <text:p text:style-name="P112">openssl_core_dispatch.pas: <text:s/>OSSL_FUNC_CRYPTO_MALLOC_ = 20;</text:p>
      <text:p text:style-name="P112">openssl_core_dispatch.pas: <text:s/>OSSL_FUNC_CRYPTO_ZALLOC_ = 21;</text:p>
      <text:p text:style-name="P112">openssl_core_dispatch.pas: <text:s/>OSSL_FUNC_CRYPTO_FREE_ = 22;</text:p>
      <text:p text:style-name="P112">openssl_core_dispatch.pas: <text:s/>OSSL_FUNC_CRYPTO_CLEAR_FREE_ = 23;</text:p>
      <text:p text:style-name="P112">openssl_core_dispatch.pas: <text:s/>OSSL_FUNC_CRYPTO_REALLOC_ = 24;</text:p>
      <text:p text:style-name="P112">openssl_core_dispatch.pas: <text:s/>OSSL_FUNC_CRYPTO_CLEAR_REALLOC_ = 25;</text:p>
      <text:p text:style-name="P112">openssl_core_dispatch.pas: <text:s/>OSSL_FUNC_CRYPTO_SECURE_MALLOC_ = 26;</text:p>
      <text:p text:style-name="P112">openssl_core_dispatch.pas: <text:s/>OSSL_FUNC_CRYPTO_SECURE_ZALLOC_ = 27;</text:p>
      <text:p text:style-name="P112">openssl_core_dispatch.pas: <text:s/>OSSL_FUNC_CRYPTO_SECURE_FREE_ = 28;</text:p>
      <text:p text:style-name="P112">openssl_core_dispatch.pas: <text:s/>OSSL_FUNC_CRYPTO_SECURE_CLEAR_FREE_ = 29;</text:p>
      <text:p text:style-name="P112">openssl_core_dispatch.pas: <text:s/>OSSL_FUNC_CRYPTO_SECURE_ALLOCATED_ = 30;</text:p>
      <text:p text:style-name="P112">openssl_core_dispatch.pas: <text:s/>OSSL_FUNC_OPENSSL_CLEANSE_ = 31;</text:p>
      <text:p text:style-name="P112">openssl_core_dispatch.pas: <text:s/>OSSL_FUNC_BIO_NEW_FILE_ = 40;</text:p>
      <text:p text:style-name="P112">openssl_core_dispatch.pas: <text:s/>OSSL_FUNC_BIO_NEW_MEMBUF_ = 41;</text:p>
      <text:p text:style-name="P112">openssl_core_dispatch.pas: <text:s/>OSSL_FUNC_BIO_READ_EX_ = 42;</text:p>
      <text:p text:style-name="P112">openssl_core_dispatch.pas: <text:s/>OSSL_FUNC_BIO_WRITE_EX_ = 43;</text:p>
      <text:p text:style-name="P112">openssl_core_dispatch.pas: <text:s/>OSSL_FUNC_BIO_UP_REF_ = 44;</text:p>
      <text:p text:style-name="P112">openssl_core_dispatch.pas: <text:s/>OSSL_FUNC_BIO_FREE_ = 45;</text:p>
      <text:p text:style-name="P112">openssl_core_dispatch.pas: <text:s/>OSSL_FUNC_BIO_VPRINTF_ = 46;</text:p>
      <text:p text:style-name="P112">openssl_core_dispatch.pas: <text:s/>OSSL_FUNC_BIO_VSNPRINTF_ = 47;</text:p>
      <text:p text:style-name="P112"><text:soft-page-break/>openssl_core_dispatch.pas: <text:s/>OSSL_FUNC_BIO_PUTS_ = 48;</text:p>
      <text:p text:style-name="P112">openssl_core_dispatch.pas: <text:s/>OSSL_FUNC_BIO_GETS_ = 49;</text:p>
      <text:p text:style-name="P112">openssl_core_dispatch.pas: <text:s/>OSSL_FUNC_BIO_CTRL_ = 50;</text:p>
      <text:p text:style-name="P112">openssl_core_dispatch.pas: <text:s/>OSSL_FUNC_CLEANUP_USER_ENTROPY_ = 96;</text:p>
      <text:p text:style-name="P112">openssl_core_dispatch.pas: <text:s/>OSSL_FUNC_CLEANUP_USER_NONCE_ = 97;</text:p>
      <text:p text:style-name="P112">openssl_core_dispatch.pas: <text:s/>OSSL_FUNC_GET_USER_ENTROPY_ = 98;</text:p>
      <text:p text:style-name="P112">openssl_core_dispatch.pas: <text:s/>OSSL_FUNC_GET_USER_NONCE_ = 99;</text:p>
      <text:p text:style-name="P112">openssl_core_dispatch.pas: <text:s/>OSSL_FUNC_INDICATOR_CB_ = 95;</text:p>
      <text:p text:style-name="P112">openssl_core_dispatch.pas: <text:s/>OSSL_FUNC_SELF_TEST_CB_ = 100;</text:p>
      <text:p text:style-name="P112">openssl_core_dispatch.pas: <text:s/>OSSL_FUNC_GET_ENTROPY_ = 101;</text:p>
      <text:p text:style-name="P112">openssl_core_dispatch.pas: <text:s/>OSSL_FUNC_CLEANUP_ENTROPY_ = 102;</text:p>
      <text:p text:style-name="P112">openssl_core_dispatch.pas: <text:s/>OSSL_FUNC_GET_NONCE_ = 103;</text:p>
      <text:p text:style-name="P112">openssl_core_dispatch.pas: <text:s/>OSSL_FUNC_CLEANUP_NONCE_ = 104;</text:p>
      <text:p text:style-name="P112">openssl_core_dispatch.pas: <text:s/>OSSL_FUNC_PROVIDER_REGISTER_CHILD_CB_ = 105;</text:p>
      <text:p text:style-name="P112">openssl_core_dispatch.pas: <text:s/>OSSL_FUNC_PROVIDER_DEREGISTER_CHILD_CB_ = 106;</text:p>
      <text:p text:style-name="P112">openssl_core_dispatch.pas: <text:s/>OSSL_FUNC_PROVIDER_NAME_ = 107;</text:p>
      <text:p text:style-name="P112">openssl_core_dispatch.pas: <text:s/>OSSL_FUNC_PROVIDER_GET0_PROVIDER_CTX_ = 108;</text:p>
      <text:p text:style-name="P112">openssl_core_dispatch.pas: <text:s/>OSSL_FUNC_PROVIDER_GET0_DISPATCH_ = 109;</text:p>
      <text:p text:style-name="P112">openssl_core_dispatch.pas: <text:s/>OSSL_FUNC_PROVIDER_UP_REF_ = 110;</text:p>
      <text:p text:style-name="P112">openssl_core_dispatch.pas: <text:s/>OSSL_FUNC_PROVIDER_FREE_ = 111;</text:p>
      <text:p text:style-name="P112">openssl_core_dispatch.pas: <text:s/>OSSL_FUNC_CORE_COUNT_TO_MARK_ = 120;</text:p>
      <text:p text:style-name="P112">openssl_core_dispatch.pas: <text:s/>OSSL_FUNC_PROVIDER_TEARDOWN_ = 1024;</text:p>
      <text:p text:style-name="P112">openssl_core_dispatch.pas: <text:s/>OSSL_FUNC_PROVIDER_GETTABLE_PARAMS_ = 1025;</text:p>
      <text:p text:style-name="P112">openssl_core_dispatch.pas: <text:s/>OSSL_FUNC_PROVIDER_GET_PARAMS_ = 1026;</text:p>
      <text:p text:style-name="P112">openssl_core_dispatch.pas: <text:s/>OSSL_FUNC_PROVIDER_QUERY_OPERATION_ = 1027;</text:p>
      <text:p text:style-name="P112">openssl_core_dispatch.pas: <text:s/>OSSL_FUNC_PROVIDER_UNQUERY_OPERATION_ = 1028;</text:p>
      <text:p text:style-name="P112">openssl_core_dispatch.pas: <text:s/>OSSL_FUNC_PROVIDER_GET_REASON_STRINGS_ = 1029;</text:p>
      <text:p text:style-name="P112">openssl_core_dispatch.pas: <text:s/>OSSL_FUNC_PROVIDER_GET_CAPABILITIES_ = 1030;</text:p>
      <text:p text:style-name="P112">openssl_core_dispatch.pas: <text:s/>OSSL_FUNC_PROVIDER_SELF_TEST_ = 1031;</text:p>
      <text:p text:style-name="P112">openssl_core_dispatch.pas: <text:s/>OSSL_FUNC_PROVIDER_RANDOM_BYTES_ = 1032;</text:p>
      <text:p text:style-name="P112">openssl_core_dispatch.pas: <text:s/>OSSL_FUNC_SSL_QUIC_TLS_CRYPTO_SEND_ = 2001;</text:p>
      <text:p text:style-name="P112">openssl_core_dispatch.pas: <text:s/>OSSL_FUNC_SSL_QUIC_TLS_CRYPTO_RECV_RCD_ = 2002;</text:p>
      <text:p text:style-name="P112">openssl_core_dispatch.pas: <text:s/>OSSL_FUNC_SSL_QUIC_TLS_CRYPTO_RELEASE_RCD_ = 2003;</text:p>
      <text:p text:style-name="P112">openssl_core_dispatch.pas: <text:s/>OSSL_FUNC_SSL_QUIC_TLS_YIELD_SECRET_ = 2004;</text:p>
      <text:p text:style-name="P112">openssl_core_dispatch.pas: <text:s/>OSSL_FUNC_SSL_QUIC_TLS_GOT_TRANSPORT_PARAMS_ = 2005;</text:p>
      <text:p text:style-name="P112">openssl_core_dispatch.pas: <text:s/>OSSL_FUNC_SSL_QUIC_TLS_ALERT_ = 2006;</text:p>
      <text:p text:style-name="P112">openssl_core_dispatch.pas: <text:s/>OSSL_FUNC_DIGEST_NEWCTX_ = 1;</text:p>
      <text:p text:style-name="P112">openssl_core_dispatch.pas: <text:s/>OSSL_FUNC_DIGEST_INIT_ = 2;</text:p>
      <text:p text:style-name="P112">openssl_core_dispatch.pas: <text:s/>OSSL_FUNC_DIGEST_UPDATE_ = 3;</text:p>
      <text:p text:style-name="P112">openssl_core_dispatch.pas: <text:s/>OSSL_FUNC_DIGEST_FINAL_ = 4;</text:p>
      <text:p text:style-name="P112">openssl_core_dispatch.pas: <text:s/>OSSL_FUNC_DIGEST_DIGEST_ = 5;</text:p>
      <text:p text:style-name="P112">openssl_core_dispatch.pas: <text:s/>OSSL_FUNC_DIGEST_FREECTX_ = 6;</text:p>
      <text:p text:style-name="P112">openssl_core_dispatch.pas: <text:s/>OSSL_FUNC_DIGEST_DUPCTX_ = 7;</text:p>
      <text:p text:style-name="P112">openssl_core_dispatch.pas: <text:s/>OSSL_FUNC_DIGEST_GET_PARAMS_ = 8;</text:p>
      <text:p text:style-name="P112">openssl_core_dispatch.pas: <text:s/>OSSL_FUNC_DIGEST_SET_CTX_PARAMS_ = 9;</text:p>
      <text:p text:style-name="P112">openssl_core_dispatch.pas: <text:s/>OSSL_FUNC_DIGEST_GET_CTX_PARAMS_ = 10;</text:p>
      <text:p text:style-name="P112">openssl_core_dispatch.pas: <text:s/>OSSL_FUNC_DIGEST_GETTABLE_PARAMS_ = 11;</text:p>
      <text:p text:style-name="P112">openssl_core_dispatch.pas: <text:s/>OSSL_FUNC_DIGEST_SETTABLE_CTX_PARAMS_ = 12;</text:p>
      <text:p text:style-name="P112">openssl_core_dispatch.pas: <text:s/>OSSL_FUNC_DIGEST_GETTABLE_CTX_PARAMS_ = 13;</text:p>
      <text:p text:style-name="P112">openssl_core_dispatch.pas: <text:s/>OSSL_FUNC_DIGEST_SQUEEZE_ = 14;</text:p>
      <text:p text:style-name="P112">openssl_core_dispatch.pas: <text:s/>OSSL_FUNC_DIGEST_COPYCTX_ = 15;</text:p>
      <text:p text:style-name="P112">openssl_core_dispatch.pas: <text:s/>OSSL_FUNC_DIGEST_SERIALIZE_ = 16;</text:p>
      <text:p text:style-name="P112">openssl_core_dispatch.pas: <text:s/>OSSL_FUNC_DIGEST_DESERIALIZE_ = 17;</text:p>
      <text:p text:style-name="P112">openssl_core_dispatch.pas: <text:s/>OSSL_FUNC_CIPHER_NEWCTX_ = 1;</text:p>
      <text:p text:style-name="P112">openssl_core_dispatch.pas: <text:s/>OSSL_FUNC_CIPHER_ENCRYPT_INIT_ = 2;</text:p>
      <text:p text:style-name="P112">openssl_core_dispatch.pas: <text:s/>OSSL_FUNC_CIPHER_DECRYPT_INIT_ = 3;</text:p>
      <text:p text:style-name="P112">openssl_core_dispatch.pas: <text:s/>OSSL_FUNC_CIPHER_UPDATE_ = 4;</text:p>
      <text:p text:style-name="P112">openssl_core_dispatch.pas: <text:s/>OSSL_FUNC_CIPHER_FINAL_ = 5;</text:p>
      <text:p text:style-name="P112">openssl_core_dispatch.pas: <text:s/>OSSL_FUNC_CIPHER_CIPHER_ = 6;</text:p>
      <text:p text:style-name="P112">openssl_core_dispatch.pas: <text:s/>OSSL_FUNC_CIPHER_FREECTX_ = 7;</text:p>
      <text:p text:style-name="P112">openssl_core_dispatch.pas: <text:s/>OSSL_FUNC_CIPHER_DUPCTX_ = 8;</text:p>
      <text:p text:style-name="P112">openssl_core_dispatch.pas: <text:s/>OSSL_FUNC_CIPHER_GET_PARAMS_ = 9;</text:p>
      <text:p text:style-name="P112">openssl_core_dispatch.pas: <text:s/>OSSL_FUNC_CIPHER_GET_CTX_PARAMS_ = 10;</text:p>
      <text:p text:style-name="P112">openssl_core_dispatch.pas: <text:s/>OSSL_FUNC_CIPHER_SET_CTX_PARAMS_ = 11;</text:p>
      <text:p text:style-name="P112">openssl_core_dispatch.pas: <text:s/>OSSL_FUNC_CIPHER_GETTABLE_PARAMS_ = 12;</text:p>
      <text:p text:style-name="P112">openssl_core_dispatch.pas: <text:s/>OSSL_FUNC_CIPHER_GETTABLE_CTX_PARAMS_ = 13;</text:p>
      <text:p text:style-name="P112">openssl_core_dispatch.pas: <text:s/>OSSL_FUNC_CIPHER_SETTABLE_CTX_PARAMS_ = 14;</text:p>
      <text:p text:style-name="P112"><text:soft-page-break/>openssl_core_dispatch.pas: <text:s/>OSSL_FUNC_CIPHER_PIPELINE_ENCRYPT_INIT_ = 15;</text:p>
      <text:p text:style-name="P112">openssl_core_dispatch.pas: <text:s/>OSSL_FUNC_CIPHER_PIPELINE_DECRYPT_INIT_ = 16;</text:p>
      <text:p text:style-name="P112">openssl_core_dispatch.pas: <text:s/>OSSL_FUNC_CIPHER_PIPELINE_UPDATE_ = 17;</text:p>
      <text:p text:style-name="P112">openssl_core_dispatch.pas: <text:s/>OSSL_FUNC_CIPHER_PIPELINE_FINAL_ = 18;</text:p>
      <text:p text:style-name="P112">openssl_core_dispatch.pas: <text:s/>OSSL_FUNC_CIPHER_ENCRYPT_SKEY_INIT_ = 19;</text:p>
      <text:p text:style-name="P112">openssl_core_dispatch.pas: <text:s/>OSSL_FUNC_CIPHER_DECRYPT_SKEY_INIT_ = 20;</text:p>
      <text:p text:style-name="P112">openssl_core_dispatch.pas: <text:s/>OSSL_FUNC_MAC_NEWCTX_ = 1;</text:p>
      <text:p text:style-name="P112">openssl_core_dispatch.pas: <text:s/>OSSL_FUNC_MAC_DUPCTX_ = 2;</text:p>
      <text:p text:style-name="P112">openssl_core_dispatch.pas: <text:s/>OSSL_FUNC_MAC_FREECTX_ = 3;</text:p>
      <text:p text:style-name="P112">openssl_core_dispatch.pas: <text:s/>OSSL_FUNC_MAC_INIT_ = 4;</text:p>
      <text:p text:style-name="P112">openssl_core_dispatch.pas: <text:s/>OSSL_FUNC_MAC_UPDATE_ = 5;</text:p>
      <text:p text:style-name="P112">openssl_core_dispatch.pas: <text:s/>OSSL_FUNC_MAC_FINAL_ = 6;</text:p>
      <text:p text:style-name="P112">openssl_core_dispatch.pas: <text:s/>OSSL_FUNC_MAC_GET_PARAMS_ = 7;</text:p>
      <text:p text:style-name="P112">openssl_core_dispatch.pas: <text:s/>OSSL_FUNC_MAC_GET_CTX_PARAMS_ = 8;</text:p>
      <text:p text:style-name="P112">openssl_core_dispatch.pas: <text:s/>OSSL_FUNC_MAC_SET_CTX_PARAMS_ = 9;</text:p>
      <text:p text:style-name="P112">openssl_core_dispatch.pas: <text:s/>OSSL_FUNC_MAC_GETTABLE_PARAMS_ = 10;</text:p>
      <text:p text:style-name="P112">openssl_core_dispatch.pas: <text:s/>OSSL_FUNC_MAC_GETTABLE_CTX_PARAMS_ = 11;</text:p>
      <text:p text:style-name="P112">openssl_core_dispatch.pas: <text:s/>OSSL_FUNC_MAC_SETTABLE_CTX_PARAMS_ = 12;</text:p>
      <text:p text:style-name="P112">openssl_core_dispatch.pas: <text:s/>OSSL_FUNC_MAC_INIT_SKEY_ = 13;</text:p>
      <text:p text:style-name="P112">openssl_core_dispatch.pas: <text:s/>OSSL_FUNC_SKEYMGMT_FREE_ = 1;</text:p>
      <text:p text:style-name="P112">openssl_core_dispatch.pas: <text:s/>OSSL_FUNC_SKEYMGMT_IMPORT_ = 2;</text:p>
      <text:p text:style-name="P112">openssl_core_dispatch.pas: <text:s/>OSSL_FUNC_SKEYMGMT_EXPORT_ = 3;</text:p>
      <text:p text:style-name="P112">openssl_core_dispatch.pas: <text:s/>OSSL_FUNC_SKEYMGMT_GENERATE_ = 4;</text:p>
      <text:p text:style-name="P112">openssl_core_dispatch.pas: <text:s/>OSSL_FUNC_SKEYMGMT_GET_KEY_ID_ = 5;</text:p>
      <text:p text:style-name="P112">openssl_core_dispatch.pas: <text:s/>OSSL_FUNC_SKEYMGMT_IMP_SETTABLE_PARAMS_ = 6;</text:p>
      <text:p text:style-name="P112">openssl_core_dispatch.pas: <text:s/>OSSL_FUNC_SKEYMGMT_GEN_SETTABLE_PARAMS_ = 7;</text:p>
      <text:p text:style-name="P112">openssl_core_dispatch.pas: <text:s/>OSSL_FUNC_KDF_NEWCTX_ = 1;</text:p>
      <text:p text:style-name="P112">openssl_core_dispatch.pas: <text:s/>OSSL_FUNC_KDF_DUPCTX_ = 2;</text:p>
      <text:p text:style-name="P112">openssl_core_dispatch.pas: <text:s/>OSSL_FUNC_KDF_FREECTX_ = 3;</text:p>
      <text:p text:style-name="P112">openssl_core_dispatch.pas: <text:s/>OSSL_FUNC_KDF_RESET_ = 4;</text:p>
      <text:p text:style-name="P112">openssl_core_dispatch.pas: <text:s/>OSSL_FUNC_KDF_DERIVE_ = 5;</text:p>
      <text:p text:style-name="P112">openssl_core_dispatch.pas: <text:s/>OSSL_FUNC_KDF_GETTABLE_PARAMS_ = 6;</text:p>
      <text:p text:style-name="P112">openssl_core_dispatch.pas: <text:s/>OSSL_FUNC_KDF_GETTABLE_CTX_PARAMS_ = 7;</text:p>
      <text:p text:style-name="P112">openssl_core_dispatch.pas: <text:s/>OSSL_FUNC_KDF_SETTABLE_CTX_PARAMS_ = 8;</text:p>
      <text:p text:style-name="P112">openssl_core_dispatch.pas: <text:s/>OSSL_FUNC_KDF_GET_PARAMS_ = 9;</text:p>
      <text:p text:style-name="P112">openssl_core_dispatch.pas: <text:s/>OSSL_FUNC_KDF_GET_CTX_PARAMS_ = 10;</text:p>
      <text:p text:style-name="P112">openssl_core_dispatch.pas: <text:s/>OSSL_FUNC_KDF_SET_CTX_PARAMS_ = 11;</text:p>
      <text:p text:style-name="P112">openssl_core_dispatch.pas: <text:s/>OSSL_FUNC_KDF_SET_SKEY_ = 12;</text:p>
      <text:p text:style-name="P112">openssl_core_dispatch.pas: <text:s/>OSSL_FUNC_KDF_DERIVE_SKEY_ = 13;</text:p>
      <text:p text:style-name="P112">openssl_core_dispatch.pas: <text:s/>OSSL_FUNC_RAND_NEWCTX_ = 1;</text:p>
      <text:p text:style-name="P112">openssl_core_dispatch.pas: <text:s/>OSSL_FUNC_RAND_FREECTX_ = 2;</text:p>
      <text:p text:style-name="P112">openssl_core_dispatch.pas: <text:s/>OSSL_FUNC_RAND_INSTANTIATE_ = 3;</text:p>
      <text:p text:style-name="P112">openssl_core_dispatch.pas: <text:s/>OSSL_FUNC_RAND_UNINSTANTIATE_ = 4;</text:p>
      <text:p text:style-name="P112">openssl_core_dispatch.pas: <text:s/>OSSL_FUNC_RAND_GENERATE_ = 5;</text:p>
      <text:p text:style-name="P112">openssl_core_dispatch.pas: <text:s/>OSSL_FUNC_RAND_RESEED_ = 6;</text:p>
      <text:p text:style-name="P112">openssl_core_dispatch.pas: <text:s/>OSSL_FUNC_RAND_NONCE_ = 7;</text:p>
      <text:p text:style-name="P112">openssl_core_dispatch.pas: <text:s/>OSSL_FUNC_RAND_ENABLE_LOCKING_ = 8;</text:p>
      <text:p text:style-name="P112">openssl_core_dispatch.pas: <text:s/>OSSL_FUNC_RAND_LOCK_ = 9;</text:p>
      <text:p text:style-name="P112">openssl_core_dispatch.pas: <text:s/>OSSL_FUNC_RAND_UNLOCK_ = 10;</text:p>
      <text:p text:style-name="P112">openssl_core_dispatch.pas: <text:s/>OSSL_FUNC_RAND_GETTABLE_PARAMS_ = 11;</text:p>
      <text:p text:style-name="P112">openssl_core_dispatch.pas: <text:s/>OSSL_FUNC_RAND_GETTABLE_CTX_PARAMS_ = 12;</text:p>
      <text:p text:style-name="P112">openssl_core_dispatch.pas: <text:s/>OSSL_FUNC_RAND_SETTABLE_CTX_PARAMS_ = 13;</text:p>
      <text:p text:style-name="P112">openssl_core_dispatch.pas: <text:s/>OSSL_FUNC_RAND_GET_PARAMS_ = 14;</text:p>
      <text:p text:style-name="P112">openssl_core_dispatch.pas: <text:s/>OSSL_FUNC_RAND_GET_CTX_PARAMS_ = 15;</text:p>
      <text:p text:style-name="P112">openssl_core_dispatch.pas: <text:s/>OSSL_FUNC_RAND_SET_CTX_PARAMS_ = 16;</text:p>
      <text:p text:style-name="P112">openssl_core_dispatch.pas: <text:s/>OSSL_FUNC_RAND_VERIFY_ZEROIZATION_ = 17;</text:p>
      <text:p text:style-name="P112">openssl_core_dispatch.pas: <text:s/>OSSL_FUNC_RAND_GET_SEED_ = 18;</text:p>
      <text:p text:style-name="P112">openssl_core_dispatch.pas: <text:s/>OSSL_FUNC_RAND_CLEAR_SEED_ = 19;</text:p>
      <text:p text:style-name="P112">openssl_core_dispatch.pas: <text:s/>OSSL_FUNC_KEYMGMT_NEW_ = 1;</text:p>
      <text:p text:style-name="P112">openssl_core_dispatch.pas: <text:s/>OSSL_FUNC_KEYMGMT_NEW_EX_ = 17;</text:p>
      <text:p text:style-name="P112">openssl_core_dispatch.pas: <text:s/>OSSL_FUNC_KEYMGMT_GEN_INIT_ = 2;</text:p>
      <text:p text:style-name="P112">openssl_core_dispatch.pas: <text:s/>OSSL_FUNC_KEYMGMT_GEN_SET_TEMPLATE_ = 3;</text:p>
      <text:p text:style-name="P112">openssl_core_dispatch.pas: <text:s/>OSSL_FUNC_KEYMGMT_GEN_SET_PARAMS_ = 4;</text:p>
      <text:p text:style-name="P112">openssl_core_dispatch.pas: <text:s/>OSSL_FUNC_KEYMGMT_GEN_SETTABLE_PARAMS_ = 5;</text:p>
      <text:p text:style-name="P112">openssl_core_dispatch.pas: <text:s/>OSSL_FUNC_KEYMGMT_GEN_ = 6;</text:p>
      <text:p text:style-name="P112"><text:soft-page-break/>openssl_core_dispatch.pas: <text:s/>OSSL_FUNC_KEYMGMT_GEN_CLEANUP_ = 7;</text:p>
      <text:p text:style-name="P112">openssl_core_dispatch.pas: <text:s/>OSSL_FUNC_KEYMGMT_GEN_GET_PARAMS_ = 15;</text:p>
      <text:p text:style-name="P112">openssl_core_dispatch.pas: <text:s/>OSSL_FUNC_KEYMGMT_GEN_GETTABLE_PARAMS_ = 16;</text:p>
      <text:p text:style-name="P112">openssl_core_dispatch.pas: <text:s/>OSSL_FUNC_KEYMGMT_LOAD_ = 8;</text:p>
      <text:p text:style-name="P112">openssl_core_dispatch.pas: <text:s/>OSSL_FUNC_KEYMGMT_FREE_ = 10;</text:p>
      <text:p text:style-name="P112">openssl_core_dispatch.pas: <text:s/>OSSL_FUNC_KEYMGMT_GET_PARAMS_ = 11;</text:p>
      <text:p text:style-name="P112">openssl_core_dispatch.pas: <text:s/>OSSL_FUNC_KEYMGMT_GETTABLE_PARAMS_ = 12;</text:p>
      <text:p text:style-name="P112">openssl_core_dispatch.pas: <text:s/>OSSL_FUNC_KEYMGMT_SET_PARAMS_ = 13;</text:p>
      <text:p text:style-name="P112">openssl_core_dispatch.pas: <text:s/>OSSL_FUNC_KEYMGMT_SETTABLE_PARAMS_ = 14;</text:p>
      <text:p text:style-name="P112">openssl_core_dispatch.pas: <text:s/>OSSL_FUNC_KEYMGMT_QUERY_OPERATION_NAME_ = 20;</text:p>
      <text:p text:style-name="P112">openssl_core_dispatch.pas: <text:s/>OSSL_FUNC_KEYMGMT_HAS_ = 21;</text:p>
      <text:p text:style-name="P112">openssl_core_dispatch.pas: <text:s/>OSSL_FUNC_KEYMGMT_VALIDATE_ = 22;</text:p>
      <text:p text:style-name="P112">openssl_core_dispatch.pas: <text:s/>OSSL_FUNC_KEYMGMT_MATCH_ = 23;</text:p>
      <text:p text:style-name="P112">openssl_core_dispatch.pas: <text:s/>OSSL_FUNC_KEYMGMT_IMPORT_ = 40;</text:p>
      <text:p text:style-name="P112">openssl_core_dispatch.pas: <text:s/>OSSL_FUNC_KEYMGMT_IMPORT_TYPES_ = 41;</text:p>
      <text:p text:style-name="P112">openssl_core_dispatch.pas: <text:s/>OSSL_FUNC_KEYMGMT_EXPORT_ = 42;</text:p>
      <text:p text:style-name="P112">openssl_core_dispatch.pas: <text:s/>OSSL_FUNC_KEYMGMT_EXPORT_TYPES_ = 43;</text:p>
      <text:p text:style-name="P112">openssl_core_dispatch.pas: <text:s/>OSSL_FUNC_KEYMGMT_DUP_ = 44;</text:p>
      <text:p text:style-name="P112">openssl_core_dispatch.pas: <text:s/>OSSL_FUNC_KEYMGMT_IMPORT_TYPES_EX_ = 45;</text:p>
      <text:p text:style-name="P112">openssl_core_dispatch.pas: <text:s/>OSSL_FUNC_KEYMGMT_EXPORT_TYPES_EX_ = 46;</text:p>
      <text:p text:style-name="P112">openssl_core_dispatch.pas: <text:s/>OSSL_FUNC_KEYEXCH_NEWCTX_ = 1;</text:p>
      <text:p text:style-name="P112">openssl_core_dispatch.pas: <text:s/>OSSL_FUNC_KEYEXCH_INIT_ = 2;</text:p>
      <text:p text:style-name="P112">openssl_core_dispatch.pas: <text:s/>OSSL_FUNC_KEYEXCH_DERIVE_ = 3;</text:p>
      <text:p text:style-name="P112">openssl_core_dispatch.pas: <text:s/>OSSL_FUNC_KEYEXCH_SET_PEER_ = 4;</text:p>
      <text:p text:style-name="P112">openssl_core_dispatch.pas: <text:s/>OSSL_FUNC_KEYEXCH_FREECTX_ = 5;</text:p>
      <text:p text:style-name="P112">openssl_core_dispatch.pas: <text:s/>OSSL_FUNC_KEYEXCH_DUPCTX_ = 6;</text:p>
      <text:p text:style-name="P112">openssl_core_dispatch.pas: <text:s/>OSSL_FUNC_KEYEXCH_SET_CTX_PARAMS_ = 7;</text:p>
      <text:p text:style-name="P112">openssl_core_dispatch.pas: <text:s/>OSSL_FUNC_KEYEXCH_SETTABLE_CTX_PARAMS_ = 8;</text:p>
      <text:p text:style-name="P112">openssl_core_dispatch.pas: <text:s/>OSSL_FUNC_KEYEXCH_GET_CTX_PARAMS_ = 9;</text:p>
      <text:p text:style-name="P112">openssl_core_dispatch.pas: <text:s/>OSSL_FUNC_KEYEXCH_GETTABLE_CTX_PARAMS_ = 10;</text:p>
      <text:p text:style-name="P112">openssl_core_dispatch.pas: <text:s/>OSSL_FUNC_KEYEXCH_DERIVE_SKEY_ = 11;</text:p>
      <text:p text:style-name="P112">openssl_core_dispatch.pas: <text:s/>OSSL_FUNC_SIGNATURE_NEWCTX_ = 1;</text:p>
      <text:p text:style-name="P112">openssl_core_dispatch.pas: <text:s/>OSSL_FUNC_SIGNATURE_SIGN_INIT_ = 2;</text:p>
      <text:p text:style-name="P112">openssl_core_dispatch.pas: <text:s/>OSSL_FUNC_SIGNATURE_SIGN_ = 3;</text:p>
      <text:p text:style-name="P112">openssl_core_dispatch.pas: <text:s/>OSSL_FUNC_SIGNATURE_VERIFY_INIT_ = 4;</text:p>
      <text:p text:style-name="P112">openssl_core_dispatch.pas: <text:s/>OSSL_FUNC_SIGNATURE_VERIFY_ = 5;</text:p>
      <text:p text:style-name="P112">openssl_core_dispatch.pas: <text:s/>OSSL_FUNC_SIGNATURE_VERIFY_RECOVER_INIT_ = 6;</text:p>
      <text:p text:style-name="P112">openssl_core_dispatch.pas: <text:s/>OSSL_FUNC_SIGNATURE_VERIFY_RECOVER_ = 7;</text:p>
      <text:p text:style-name="P112">openssl_core_dispatch.pas: <text:s/>OSSL_FUNC_SIGNATURE_DIGEST_SIGN_INIT_ = 8;</text:p>
      <text:p text:style-name="P112">openssl_core_dispatch.pas: <text:s/>OSSL_FUNC_SIGNATURE_DIGEST_SIGN_UPDATE_ = 9;</text:p>
      <text:p text:style-name="P112">openssl_core_dispatch.pas: <text:s/>OSSL_FUNC_SIGNATURE_DIGEST_SIGN_FINAL_ = 10;</text:p>
      <text:p text:style-name="P112">openssl_core_dispatch.pas: <text:s/>OSSL_FUNC_SIGNATURE_DIGEST_SIGN_ = 11;</text:p>
      <text:p text:style-name="P112">openssl_core_dispatch.pas: <text:s/>OSSL_FUNC_SIGNATURE_DIGEST_VERIFY_INIT_ = 12;</text:p>
      <text:p text:style-name="P112">openssl_core_dispatch.pas: <text:s/>OSSL_FUNC_SIGNATURE_DIGEST_VERIFY_UPDATE_ = 13;</text:p>
      <text:p text:style-name="P112">openssl_core_dispatch.pas: <text:s/>OSSL_FUNC_SIGNATURE_DIGEST_VERIFY_FINAL_ = 14;</text:p>
      <text:p text:style-name="P112">openssl_core_dispatch.pas: <text:s/>OSSL_FUNC_SIGNATURE_DIGEST_VERIFY_ = 15;</text:p>
      <text:p text:style-name="P112">openssl_core_dispatch.pas: <text:s/>OSSL_FUNC_SIGNATURE_FREECTX_ = 16;</text:p>
      <text:p text:style-name="P112">openssl_core_dispatch.pas: <text:s/>OSSL_FUNC_SIGNATURE_DUPCTX_ = 17;</text:p>
      <text:p text:style-name="P112">openssl_core_dispatch.pas: <text:s/>OSSL_FUNC_SIGNATURE_GET_CTX_PARAMS_ = 18;</text:p>
      <text:p text:style-name="P112">openssl_core_dispatch.pas: <text:s/>OSSL_FUNC_SIGNATURE_GETTABLE_CTX_PARAMS_ = 19;</text:p>
      <text:p text:style-name="P112">openssl_core_dispatch.pas: <text:s/>OSSL_FUNC_SIGNATURE_SET_CTX_PARAMS_ = 20;</text:p>
      <text:p text:style-name="P112">openssl_core_dispatch.pas: <text:s/>OSSL_FUNC_SIGNATURE_SETTABLE_CTX_PARAMS_ = 21;</text:p>
      <text:p text:style-name="P112">openssl_core_dispatch.pas: <text:s/>OSSL_FUNC_SIGNATURE_GET_CTX_MD_PARAMS_ = 22;</text:p>
      <text:p text:style-name="P112">openssl_core_dispatch.pas: <text:s/>OSSL_FUNC_SIGNATURE_GETTABLE_CTX_MD_PARAMS_ = 23;</text:p>
      <text:p text:style-name="P112">openssl_core_dispatch.pas: <text:s/>OSSL_FUNC_SIGNATURE_SET_CTX_MD_PARAMS_ = 24;</text:p>
      <text:p text:style-name="P112">openssl_core_dispatch.pas: <text:s/>OSSL_FUNC_SIGNATURE_SETTABLE_CTX_MD_PARAMS_ = 25;</text:p>
      <text:p text:style-name="P112">openssl_core_dispatch.pas: <text:s/>OSSL_FUNC_SIGNATURE_QUERY_KEY_TYPES_ = 26;</text:p>
      <text:p text:style-name="P112">openssl_core_dispatch.pas: <text:s/>OSSL_FUNC_SIGNATURE_SIGN_MESSAGE_INIT_ = 27;</text:p>
      <text:p text:style-name="P112">openssl_core_dispatch.pas: <text:s/>OSSL_FUNC_SIGNATURE_SIGN_MESSAGE_UPDATE_ = 28;</text:p>
      <text:p text:style-name="P112">openssl_core_dispatch.pas: <text:s/>OSSL_FUNC_SIGNATURE_SIGN_MESSAGE_FINAL_ = 29;</text:p>
      <text:p text:style-name="P112">openssl_core_dispatch.pas: <text:s/>OSSL_FUNC_SIGNATURE_VERIFY_MESSAGE_INIT_ = 30;</text:p>
      <text:p text:style-name="P112">openssl_core_dispatch.pas: <text:s/>OSSL_FUNC_SIGNATURE_VERIFY_MESSAGE_UPDATE_ = 31;</text:p>
      <text:p text:style-name="P112">openssl_core_dispatch.pas: <text:s/>OSSL_FUNC_SIGNATURE_VERIFY_MESSAGE_FINAL_ = 32;</text:p>
      <text:p text:style-name="P112">openssl_core_dispatch.pas: <text:s/>OSSL_FUNC_ASYM_CIPHER_NEWCTX_ = 1;</text:p>
      <text:p text:style-name="P112">openssl_core_dispatch.pas: <text:s/>OSSL_FUNC_ASYM_CIPHER_ENCRYPT_INIT_ = 2;</text:p>
      <text:p text:style-name="P112">openssl_core_dispatch.pas: <text:s/>OSSL_FUNC_ASYM_CIPHER_ENCRYPT_ = 3;</text:p>
      <text:p text:style-name="P112">openssl_core_dispatch.pas: <text:s/>OSSL_FUNC_ASYM_CIPHER_DECRYPT_INIT_ = 4;</text:p>
      <text:p text:style-name="P112"><text:soft-page-break/>openssl_core_dispatch.pas: <text:s/>OSSL_FUNC_ASYM_CIPHER_DECRYPT_ = 5;</text:p>
      <text:p text:style-name="P112">openssl_core_dispatch.pas: <text:s/>OSSL_FUNC_ASYM_CIPHER_FREECTX_ = 6;</text:p>
      <text:p text:style-name="P112">openssl_core_dispatch.pas: <text:s/>OSSL_FUNC_ASYM_CIPHER_DUPCTX_ = 7;</text:p>
      <text:p text:style-name="P112">openssl_core_dispatch.pas: <text:s/>OSSL_FUNC_ASYM_CIPHER_GET_CTX_PARAMS_ = 8;</text:p>
      <text:p text:style-name="P112">openssl_core_dispatch.pas: <text:s/>OSSL_FUNC_ASYM_CIPHER_GETTABLE_CTX_PARAMS_ = 9;</text:p>
      <text:p text:style-name="P112">openssl_core_dispatch.pas: <text:s/>OSSL_FUNC_ASYM_CIPHER_SET_CTX_PARAMS_ = 10;</text:p>
      <text:p text:style-name="P112">openssl_core_dispatch.pas: <text:s/>OSSL_FUNC_ASYM_CIPHER_SETTABLE_CTX_PARAMS_ = 11;</text:p>
      <text:p text:style-name="P112">openssl_core_dispatch.pas: <text:s/>OSSL_FUNC_KEM_NEWCTX_ = 1;</text:p>
      <text:p text:style-name="P112">openssl_core_dispatch.pas: <text:s/>OSSL_FUNC_KEM_ENCAPSULATE_INIT_ = 2;</text:p>
      <text:p text:style-name="P112">openssl_core_dispatch.pas: <text:s/>OSSL_FUNC_KEM_ENCAPSULATE_ = 3;</text:p>
      <text:p text:style-name="P112">openssl_core_dispatch.pas: <text:s/>OSSL_FUNC_KEM_DECAPSULATE_INIT_ = 4;</text:p>
      <text:p text:style-name="P112">openssl_core_dispatch.pas: <text:s/>OSSL_FUNC_KEM_DECAPSULATE_ = 5;</text:p>
      <text:p text:style-name="P112">openssl_core_dispatch.pas: <text:s/>OSSL_FUNC_KEM_FREECTX_ = 6;</text:p>
      <text:p text:style-name="P112">openssl_core_dispatch.pas: <text:s/>OSSL_FUNC_KEM_DUPCTX_ = 7;</text:p>
      <text:p text:style-name="P112">openssl_core_dispatch.pas: <text:s/>OSSL_FUNC_KEM_GET_CTX_PARAMS_ = 8;</text:p>
      <text:p text:style-name="P112">openssl_core_dispatch.pas: <text:s/>OSSL_FUNC_KEM_GETTABLE_CTX_PARAMS_ = 9;</text:p>
      <text:p text:style-name="P112">openssl_core_dispatch.pas: <text:s/>OSSL_FUNC_KEM_SET_CTX_PARAMS_ = 10;</text:p>
      <text:p text:style-name="P112">openssl_core_dispatch.pas: <text:s/>OSSL_FUNC_KEM_SETTABLE_CTX_PARAMS_ = 11;</text:p>
      <text:p text:style-name="P112">openssl_core_dispatch.pas: <text:s/>OSSL_FUNC_KEM_AUTH_ENCAPSULATE_INIT_ = 12;</text:p>
      <text:p text:style-name="P112">openssl_core_dispatch.pas: <text:s/>OSSL_FUNC_KEM_AUTH_DECAPSULATE_INIT_ = 13;</text:p>
      <text:p text:style-name="P112">openssl_core_dispatch.pas: <text:s/>OSSL_FUNC_ENCODER_NEWCTX_ = 1;</text:p>
      <text:p text:style-name="P112">openssl_core_dispatch.pas: <text:s/>OSSL_FUNC_ENCODER_FREECTX_ = 2;</text:p>
      <text:p text:style-name="P112">openssl_core_dispatch.pas: <text:s/>OSSL_FUNC_ENCODER_GET_PARAMS_ = 3;</text:p>
      <text:p text:style-name="P112">openssl_core_dispatch.pas: <text:s/>OSSL_FUNC_ENCODER_GETTABLE_PARAMS_ = 4;</text:p>
      <text:p text:style-name="P112">openssl_core_dispatch.pas: <text:s/>OSSL_FUNC_ENCODER_SET_CTX_PARAMS_ = 5;</text:p>
      <text:p text:style-name="P112">openssl_core_dispatch.pas: <text:s/>OSSL_FUNC_ENCODER_SETTABLE_CTX_PARAMS_ = 6;</text:p>
      <text:p text:style-name="P112">openssl_core_dispatch.pas: <text:s/>OSSL_FUNC_ENCODER_DOES_SELECTION_ = 10;</text:p>
      <text:p text:style-name="P112">openssl_core_dispatch.pas: <text:s/>OSSL_FUNC_ENCODER_ENCODE_ = 11;</text:p>
      <text:p text:style-name="P112">openssl_core_dispatch.pas: <text:s/>OSSL_FUNC_ENCODER_IMPORT_OBJECT_ = 20;</text:p>
      <text:p text:style-name="P112">openssl_core_dispatch.pas: <text:s/>OSSL_FUNC_ENCODER_FREE_OBJECT_ = 21;</text:p>
      <text:p text:style-name="P112">openssl_core_dispatch.pas: <text:s/>OSSL_FUNC_DECODER_NEWCTX_ = 1;</text:p>
      <text:p text:style-name="P112">openssl_core_dispatch.pas: <text:s/>OSSL_FUNC_DECODER_FREECTX_ = 2;</text:p>
      <text:p text:style-name="P112">openssl_core_dispatch.pas: <text:s/>OSSL_FUNC_DECODER_GET_PARAMS_ = 3;</text:p>
      <text:p text:style-name="P112">openssl_core_dispatch.pas: <text:s/>OSSL_FUNC_DECODER_GETTABLE_PARAMS_ = 4;</text:p>
      <text:p text:style-name="P112">openssl_core_dispatch.pas: <text:s/>OSSL_FUNC_DECODER_SET_CTX_PARAMS_ = 5;</text:p>
      <text:p text:style-name="P112">openssl_core_dispatch.pas: <text:s/>OSSL_FUNC_DECODER_SETTABLE_CTX_PARAMS_ = 6;</text:p>
      <text:p text:style-name="P112">openssl_core_dispatch.pas: <text:s/>OSSL_FUNC_DECODER_DOES_SELECTION_ = 10;</text:p>
      <text:p text:style-name="P112">openssl_core_dispatch.pas: <text:s/>OSSL_FUNC_DECODER_DECODE_ = 11;</text:p>
      <text:p text:style-name="P112">openssl_core_dispatch.pas: <text:s/>OSSL_FUNC_DECODER_EXPORT_OBJECT_ = 20;</text:p>
      <text:p text:style-name="P112">openssl_core_dispatch.pas: <text:s/>OSSL_FUNC_STORE_OPEN_ = 1;</text:p>
      <text:p text:style-name="P112">openssl_core_dispatch.pas: <text:s/>OSSL_FUNC_STORE_ATTACH_ = 2;</text:p>
      <text:p text:style-name="P112">openssl_core_dispatch.pas: <text:s/>OSSL_FUNC_STORE_SETTABLE_CTX_PARAMS_ = 3;</text:p>
      <text:p text:style-name="P112">openssl_core_dispatch.pas: <text:s/>OSSL_FUNC_STORE_SET_CTX_PARAMS_ = 4;</text:p>
      <text:p text:style-name="P112">openssl_core_dispatch.pas: <text:s/>OSSL_FUNC_STORE_LOAD_ = 5;</text:p>
      <text:p text:style-name="P112">openssl_core_dispatch.pas: <text:s/>OSSL_FUNC_STORE_EOF_ = 6;</text:p>
      <text:p text:style-name="P112">openssl_core_dispatch.pas: <text:s/>OSSL_FUNC_STORE_CLOSE_ = 7;</text:p>
      <text:p text:style-name="P112">openssl_core_dispatch.pas: <text:s/>OSSL_FUNC_STORE_EXPORT_OBJECT_ = 8;</text:p>
      <text:p text:style-name="P112">openssl_core_dispatch.pas: <text:s/>OSSL_FUNC_STORE_DELETE_ = 9;</text:p>
      <text:p text:style-name="P112">openssl_core_dispatch.pas: <text:s/>OSSL_FUNC_STORE_OPEN_EX_ = 10;</text:p>
      <text:p text:style-name="P112">openssl_crypto.pas: <text:s/>OPENSSL_VERSION_ = 0;</text:p>
      <text:p text:style-name="P112">openssl_idea.pas: <text:s/>IDEA_ENCRYPT_ = 1;</text:p>
      <text:p text:style-name="P112">openssl_pkcs7.pas: <text:s/>PKCS7_STREAM_ = $1000;</text:p>
      <text:p text:style-name="P112">openssl_rc2.pas: <text:s/>RC2_ENCRYPT_ = 1;</text:p>
      <text:p text:style-name="P112">openssl_rc2.pas: <text:s/>RC2_DECRYPT_ = 0;</text:p>
      <text:p text:style-name="P112">openssl_ssl.pas: <text:s/>SSL_TXT_kECDHE_ = 'kECDHE';</text:p>
      <text:p text:style-name="P112">openssl_ssl.pas: <text:s/>SSL_TXT_ADH_ = 'ADH';</text:p>
      <text:p text:style-name="P112">openssl_ssl.pas: <text:s/>SSL_TXT_AECDH_ = 'AECDH';</text:p>
      <text:p text:style-name="P112">openssl_store.pas: <text:s/>OSSL_STORE_SEARCH_BY_NAME_ = 1;</text:p>
      <text:p text:style-name="P112">openssl_store.pas: <text:s/>OSSL_STORE_SEARCH_BY_ISSUER_SERIAL_ = 2;</text:p>
      <text:p text:style-name="P112">openssl_store.pas: <text:s/>OSSL_STORE_SEARCH_BY_KEY_FINGERPRINT_ = 3;</text:p>
      <text:p text:style-name="P112">openssl_store.pas: <text:s/>OSSL_STORE_SEARCH_BY_ALIAS_ = 4;</text:p>
      <text:p text:style-name="P124"><text:bookmark-start text:name="__RefHeading___Toc4041_3240325666"/>Appendix B - Allow Nil Functions<text:bookmark-end text:name="__RefHeading___Toc4041_3240325666"/></text:p>
      <text:p text:style-name="P125">Only a small number of functions are currently allowed to be nil on load, and are limited to legacy support functions for TLS and SSL methods in OpenSSL 3.x. These are:</text:p>
      <text:p text:style-name="P126">TLSv1_method</text:p>
      <text:p text:style-name="P127">TLSv1_server_method</text:p>
      <text:p text:style-name="P127">TLSv1_client_method</text:p>
      <text:p text:style-name="P127">TLSv1_1_method</text:p>
      <text:p text:style-name="P127">TLSv1_1_server_method</text:p>
      <text:p text:style-name="P127">TLSv1_1_client_method</text:p>
      <text:p text:style-name="P127">TLSv1_2_method</text:p>
      <text:p text:style-name="P127">TLSv1_2_server_method</text:p>
      <text:p text:style-name="P127">TLSv1_2_client_method</text:p>
      <text:p text:style-name="P127">SSLv3_method</text:p>
      <text:p text:style-name="P127">SSLv3_server_method</text:p>
      <text:p text:style-name="P127">SSLv3_client_method</text:p>
      <text:p text:style-name="P127">SSLv23_method</text:p>
      <text:p text:style-name="P127">SSLv23_server_method</text:p>
      <text:p text:style-name="P127">SSLv23_client_metho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MT" svg:font-family="'Arial MT'" style:font-family-generic="swiss"/>
    <style:font-face style:name="CG Times" svg:font-family="'CG Times'" style:font-family-generic="roman" style:font-pitch="variable"/>
    <style:font-face style:name="Courier" svg:font-family="Courier, 'Courier New'" style:font-family-generic="modern"/>
    <style:font-face style:name="Courier New" svg:font-family="'Courier New'" style:font-family-generic="modern"/>
    <style:font-face style:name="Courier New1" svg:font-family="'Courier New'" style:font-adornments="Regular" style:font-family-generic="modern" style:font-pitch="fixed"/>
    <style:font-face style:name="DejaVu Sans" svg:font-family="'DejaVu Sans'" style:font-family-generic="system" style:font-pitch="variable"/>
    <style:font-face style:name="Helv" svg:font-family="Helv, Arial" style:font-family-generic="swiss" style:font-pitch="variable"/>
    <style:font-face style:name="Helvetica" svg:font-family="Helvetica"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OpenSymbol" svg:font-family="OpenSymbol" style:font-charset="x-symbol"/>
    <style:font-face style:name="Palatino" svg:font-family="Palatino" style:font-family-generic="roman" style:font-pitch="variable"/>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NewRomanPS" svg:font-family="TimesNewRomanPS" style:font-family-generic="roman"/>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GB" style:font-name-asian="DejaVu Sans" style:font-size-asian="10.5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GB" style:font-name-asian="DejaVu Sans" style:font-size-asian="10.5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loext:opacity="0%" style:font-name="Liberation Sans2"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loext:opacity="100%" style:font-name="Liberation Sans2"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loext:opacity="0%"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loext:opacity="0%"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loext:opacity="0%"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loext:opacity="0%"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loext:opacity="0%"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loext:opacity="0%"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loext:opacity="0%"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loext:opacity="0%"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loext:opacity="0%"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loext:opacity="0%"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loext:opacity="0%"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loext:opacity="0%"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loext:opacity="0%"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loext:opacity="0%"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loext:opacity="0%"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loext:opacity="0%"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loext:opacity="0%"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loext:opacity="0%"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loext:opacity="0%"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loext:opacity="0%"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loext:opacity="1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loext:opacity="1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loext:opacity="1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loext:opacity="1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loext:opacity="1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loext:opacity="1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loext:opacity="1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loext:opacity="1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loext:opacity="1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loext:opacity="0%"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class="chapter"/>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loext:opacity="1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loext:opacity="1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style: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style: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style:contextual-spacing="true" fo:text-align="start" style:justify-single-word="false" fo:text-indent="0in" style:auto-text-indent="false" style:page-number="auto" fo:background-color="#eeeeee" fo:keep-with-next="always"/>
      <style:text-properties style:font-name="Liberation Mono1"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loext:opacity="100%"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text:style-name="SectionNumber" loext:num-list-format="%1%" style:num-format="1">
        <style:list-level-properties text:space-before="0.25in" text:min-label-width="0.6in"/>
      </text:outline-level-style>
      <text:outline-level-style text:level="2" loext:num-list-format="%1%.%2%" style:num-format="1" text:display-levels="2">
        <style:list-level-properties text:space-before="0.25in" text:min-label-width="0.6in"/>
      </text:outline-level-style>
      <text:outline-level-style text:level="3" loext:num-list-format="%1%.%2%.%3%" style:num-format="1" text:display-levels="3">
        <style:list-level-properties text:space-before="0.25in" text:min-label-width="0.6in"/>
      </text:outline-level-style>
      <text:outline-level-style text:level="4" loext:num-list-format="%1%.%2%.%3%.%4%" style:num-format="1" text:display-levels="4">
        <style:list-level-properties text:space-before="0.25in" text:min-label-width="0.6in"/>
      </text:outline-level-style>
      <text:outline-level-style text:level="5" loext:num-list-format="%1%.%2%.%3%.%4%.%5%" style:num-format="1" text:display-levels="5">
        <style:list-level-properties text:space-before="0.25in" text:min-label-width="0.6in"/>
      </text:outline-level-style>
      <text:outline-level-style text:level="6" loext:num-list-format="%6%" style:num-format="1">
        <style:list-level-properties text:space-before="0.25in" text:min-label-width="0.6in"/>
      </text:outline-level-style>
      <text:outline-level-style text:level="7" loext:num-list-format="%7%" style:num-format="1">
        <style:list-level-properties text:space-before="0.25in" text:min-label-width="0.6in"/>
      </text:outline-level-style>
      <text:outline-level-style text:level="8" loext:num-list-format="%7%.%8%" style:num-format="1" text:display-levels="2">
        <style:list-level-properties text:space-before="0.25in" text:min-label-width="0.6in"/>
      </text:outline-level-style>
      <text:outline-level-style text:level="9" loext:num-list-format="%7%.%8%.%9%" style:num-format="1" text:display-levels="3">
        <style:list-level-properties text:space-before="0.25in" text:min-label-width="0.6in"/>
      </text:outline-level-style>
      <text:outline-level-style text:level="10" loext:num-list-format="%10%" style:num-format="">
        <style:list-level-properties text:space-before="0.25in" text:min-label-width="0.6in"/>
      </text:outline-level-style>
    </text:outline-style>
    <text:list-style style:name="List_20_1" style:display-name="List 1">
      <text:list-level-style-bullet text:level="1" text:style-name="Numbering_20_Symbols" loext:num-list-format="%1%" text:bullet-char="•">
        <style:list-level-properties text:min-label-width="0.1575in"/>
        <style:text-properties fo:font-family="StarSymbol"/>
      </text:list-level-style-bullet>
      <text:list-level-style-bullet text:level="2" text:style-name="Numbering_20_Symbols" loext:num-list-format="%2%" text:bullet-char="•">
        <style:list-level-properties text:space-before="0.1579in" text:min-label-width="0.1575in"/>
        <style:text-properties fo:font-family="StarSymbol"/>
      </text:list-level-style-bullet>
      <text:list-level-style-bullet text:level="3" text:style-name="Numbering_20_Symbols" loext:num-list-format="%3%" text:bullet-char="•">
        <style:list-level-properties text:space-before="0.3146in" text:min-label-width="0.1575in"/>
        <style:text-properties fo:font-family="StarSymbol"/>
      </text:list-level-style-bullet>
      <text:list-level-style-bullet text:level="4" text:style-name="Numbering_20_Symbols" loext:num-list-format="%4%" text:bullet-char="•">
        <style:list-level-properties text:space-before="0.4724in" text:min-label-width="0.1575in"/>
        <style:text-properties fo:font-family="StarSymbol"/>
      </text:list-level-style-bullet>
      <text:list-level-style-bullet text:level="5" text:style-name="Numbering_20_Symbols" loext:num-list-format="%5%" text:bullet-char="•">
        <style:list-level-properties text:space-before="0.6299in" text:min-label-width="0.1575in"/>
        <style:text-properties fo:font-family="StarSymbol"/>
      </text:list-level-style-bullet>
      <text:list-level-style-bullet text:level="6" text:style-name="Numbering_20_Symbols" loext:num-list-format="%6%" text:bullet-char="•">
        <style:list-level-properties text:space-before="0.7878in" text:min-label-width="0.1575in"/>
        <style:text-properties fo:font-family="StarSymbol"/>
      </text:list-level-style-bullet>
      <text:list-level-style-bullet text:level="7" text:style-name="Numbering_20_Symbols" loext:num-list-format="%7%" text:bullet-char="•">
        <style:list-level-properties text:space-before="0.9445in" text:min-label-width="0.1575in"/>
        <style:text-properties fo:font-family="StarSymbol"/>
      </text:list-level-style-bullet>
      <text:list-level-style-bullet text:level="8" text:style-name="Numbering_20_Symbols" loext:num-list-format="%8%" text:bullet-char="•">
        <style:list-level-properties text:space-before="1.1024in" text:min-label-width="0.1575in"/>
        <style:text-properties fo:font-family="StarSymbol"/>
      </text:list-level-style-bullet>
      <text:list-level-style-bullet text:level="9" text:style-name="Numbering_20_Symbols" loext:num-list-format="%9%" text:bullet-char="•">
        <style:list-level-properties text:space-before="1.2598in" text:min-label-width="0.1575in"/>
        <style:text-properties fo:font-family="StarSymbol"/>
      </text:list-level-style-bullet>
      <text:list-level-style-bullet text:level="10" text:style-name="Numbering_20_Symbols" loext:num-list-format="%10%"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fo:font-family="StarSymbol"/>
      </text:list-level-style-bullet>
      <text:list-level-style-bullet text:level="2" text:style-name="Numbering_20_Symbols" loext:num-list-format="%2%" text:bullet-char="–">
        <style:list-level-properties text:space-before="0.1181in" text:min-label-width="0.1181in"/>
        <style:text-properties fo:font-family="StarSymbol"/>
      </text:list-level-style-bullet>
      <text:list-level-style-bullet text:level="3" text:style-name="Numbering_20_Symbols" loext:num-list-format="%3%" text:bullet-char="–">
        <style:list-level-properties text:space-before="0.2362in" text:min-label-width="0.1181in"/>
        <style:text-properties fo:font-family="StarSymbol"/>
      </text:list-level-style-bullet>
      <text:list-level-style-bullet text:level="4" text:style-name="Numbering_20_Symbols" loext:num-list-format="%4%" text:bullet-char="–">
        <style:list-level-properties text:space-before="0.3539in" text:min-label-width="0.1181in"/>
        <style:text-properties fo:font-family="StarSymbol"/>
      </text:list-level-style-bullet>
      <text:list-level-style-bullet text:level="5" text:style-name="Numbering_20_Symbols" loext:num-list-format="%5%" text:bullet-char="–">
        <style:list-level-properties text:space-before="0.472in" text:min-label-width="0.1181in"/>
        <style:text-properties fo:font-family="StarSymbol"/>
      </text:list-level-style-bullet>
      <text:list-level-style-bullet text:level="6" text:style-name="Numbering_20_Symbols" loext:num-list-format="%6%" text:bullet-char="–">
        <style:list-level-properties text:space-before="0.5902in" text:min-label-width="0.1181in"/>
        <style:text-properties fo:font-family="StarSymbol"/>
      </text:list-level-style-bullet>
      <text:list-level-style-bullet text:level="7" text:style-name="Numbering_20_Symbols" loext:num-list-format="%7%" text:bullet-char="–">
        <style:list-level-properties text:space-before="0.7091in" text:min-label-width="0.1181in"/>
        <style:text-properties fo:font-family="StarSymbol"/>
      </text:list-level-style-bullet>
      <text:list-level-style-bullet text:level="8" text:style-name="Numbering_20_Symbols" loext:num-list-format="%8%" text:bullet-char="–">
        <style:list-level-properties text:space-before="0.8272in" text:min-label-width="0.1181in"/>
        <style:text-properties fo:font-family="StarSymbol"/>
      </text:list-level-style-bullet>
      <text:list-level-style-bullet text:level="9" text:style-name="Numbering_20_Symbols" loext:num-list-format="%9%" text:bullet-char="–">
        <style:list-level-properties text:space-before="0.9453in" text:min-label-width="0.1181in"/>
        <style:text-properties fo:font-family="StarSymbol"/>
      </text:list-level-style-bullet>
      <text:list-level-style-bullet text:level="10" text:style-name="Numbering_20_Symbols" loext:num-list-format="%10%"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fo:font-family="StarSymbol"/>
      </text:list-level-style-bullet>
      <text:list-level-style-bullet text:level="2" text:style-name="Numbering_20_Symbols" loext:num-list-format="%2%" text:bullet-char="□">
        <style:list-level-properties text:space-before="0.1555in" text:min-label-width="0.1555in"/>
        <style:text-properties fo:font-family="StarSymbol"/>
      </text:list-level-style-bullet>
      <text:list-level-style-bullet text:level="3" text:style-name="Numbering_20_Symbols" loext:num-list-format="%3%" text:bullet-char="☑">
        <style:list-level-properties text:min-label-width="0.1555in"/>
        <style:text-properties fo:font-family="StarSymbol"/>
      </text:list-level-style-bullet>
      <text:list-level-style-bullet text:level="4" text:style-name="Numbering_20_Symbols" loext:num-list-format="%4%" text:bullet-char="□">
        <style:list-level-properties text:space-before="0.1555in" text:min-label-width="0.1555in"/>
        <style:text-properties fo:font-family="StarSymbol"/>
      </text:list-level-style-bullet>
      <text:list-level-style-bullet text:level="5" text:style-name="Numbering_20_Symbols" loext:num-list-format="%5%" text:bullet-char="☑">
        <style:list-level-properties text:min-label-width="0.1555in"/>
        <style:text-properties fo:font-family="StarSymbol"/>
      </text:list-level-style-bullet>
      <text:list-level-style-bullet text:level="6" text:style-name="Numbering_20_Symbols" loext:num-list-format="%6%" text:bullet-char="□">
        <style:list-level-properties text:space-before="0.1555in" text:min-label-width="0.1555in"/>
        <style:text-properties fo:font-family="StarSymbol"/>
      </text:list-level-style-bullet>
      <text:list-level-style-bullet text:level="7" text:style-name="Numbering_20_Symbols" loext:num-list-format="%7%" text:bullet-char="☑">
        <style:list-level-properties text:min-label-width="0.1555in"/>
        <style:text-properties fo:font-family="StarSymbol"/>
      </text:list-level-style-bullet>
      <text:list-level-style-bullet text:level="8" text:style-name="Numbering_20_Symbols" loext:num-list-format="%8%" text:bullet-char="□">
        <style:list-level-properties text:space-before="0.1555in" text:min-label-width="0.1555in"/>
        <style:text-properties fo:font-family="StarSymbol"/>
      </text:list-level-style-bullet>
      <text:list-level-style-bullet text:level="9" text:style-name="Numbering_20_Symbols" loext:num-list-format="%9%" text:bullet-char="☑">
        <style:list-level-properties text:min-label-width="0.1555in"/>
        <style:text-properties fo:font-family="StarSymbol"/>
      </text:list-level-style-bullet>
      <text:list-level-style-bullet text:level="10" text:style-name="Numbering_20_Symbols" loext:num-list-format="%10%"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fo:font-family="StarSymbol"/>
      </text:list-level-style-bullet>
      <text:list-level-style-bullet text:level="2" text:style-name="Numbering_20_Symbols" loext:num-list-format="%2%" text:bullet-char="">
        <style:list-level-properties text:space-before="0.1579in" text:min-label-width="0.1575in"/>
        <style:text-properties fo:font-family="StarSymbol"/>
      </text:list-level-style-bullet>
      <text:list-level-style-bullet text:level="3" text:style-name="Numbering_20_Symbols" loext:num-list-format="%3%" text:bullet-char="">
        <style:list-level-properties text:space-before="0.3146in" text:min-label-width="0.1575in"/>
        <style:text-properties fo:font-family="StarSymbol"/>
      </text:list-level-style-bullet>
      <text:list-level-style-bullet text:level="4" text:style-name="Numbering_20_Symbols" loext:num-list-format="%4%" text:bullet-char="">
        <style:list-level-properties text:space-before="0.4724in" text:min-label-width="0.1575in"/>
        <style:text-properties fo:font-family="StarSymbol"/>
      </text:list-level-style-bullet>
      <text:list-level-style-bullet text:level="5" text:style-name="Numbering_20_Symbols" loext:num-list-format="%5%" text:bullet-char="">
        <style:list-level-properties text:space-before="0.6299in" text:min-label-width="0.1575in"/>
        <style:text-properties fo:font-family="StarSymbol"/>
      </text:list-level-style-bullet>
      <text:list-level-style-bullet text:level="6" text:style-name="Numbering_20_Symbols" loext:num-list-format="%6%" text:bullet-char="">
        <style:list-level-properties text:space-before="0.7878in" text:min-label-width="0.1575in"/>
        <style:text-properties fo:font-family="StarSymbol"/>
      </text:list-level-style-bullet>
      <text:list-level-style-bullet text:level="7" text:style-name="Numbering_20_Symbols" loext:num-list-format="%7%" text:bullet-char="">
        <style:list-level-properties text:space-before="0.9445in" text:min-label-width="0.1575in"/>
        <style:text-properties fo:font-family="StarSymbol"/>
      </text:list-level-style-bullet>
      <text:list-level-style-bullet text:level="8" text:style-name="Numbering_20_Symbols" loext:num-list-format="%8%" text:bullet-char="">
        <style:list-level-properties text:space-before="1.1024in" text:min-label-width="0.1575in"/>
        <style:text-properties fo:font-family="StarSymbol"/>
      </text:list-level-style-bullet>
      <text:list-level-style-bullet text:level="9" text:style-name="Numbering_20_Symbols" loext:num-list-format="%9%" text:bullet-char="">
        <style:list-level-properties text:space-before="1.2598in" text:min-label-width="0.1575in"/>
        <style:text-properties fo:font-family="StarSymbol"/>
      </text:list-level-style-bullet>
      <text:list-level-style-bullet text:level="10" text:style-name="Numbering_20_Symbols" loext:num-list-format="%10%"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fo:font-family="StarSymbol"/>
      </text:list-level-style-bullet>
      <text:list-level-style-bullet text:level="2" text:style-name="Numbering_20_Symbols" loext:num-list-format="%2%" text:bullet-char="✗">
        <style:list-level-properties text:space-before="0.1579in" text:min-label-width="0.1575in"/>
        <style:text-properties fo:font-family="StarSymbol"/>
      </text:list-level-style-bullet>
      <text:list-level-style-bullet text:level="3" text:style-name="Numbering_20_Symbols" loext:num-list-format="%3%" text:bullet-char="✗">
        <style:list-level-properties text:space-before="0.3146in" text:min-label-width="0.1575in"/>
        <style:text-properties fo:font-family="StarSymbol"/>
      </text:list-level-style-bullet>
      <text:list-level-style-bullet text:level="4" text:style-name="Numbering_20_Symbols" loext:num-list-format="%4%" text:bullet-char="✗">
        <style:list-level-properties text:space-before="0.4724in" text:min-label-width="0.1575in"/>
        <style:text-properties fo:font-family="StarSymbol"/>
      </text:list-level-style-bullet>
      <text:list-level-style-bullet text:level="5" text:style-name="Numbering_20_Symbols" loext:num-list-format="%5%" text:bullet-char="✗">
        <style:list-level-properties text:space-before="0.6299in" text:min-label-width="0.1575in"/>
        <style:text-properties fo:font-family="StarSymbol"/>
      </text:list-level-style-bullet>
      <text:list-level-style-bullet text:level="6" text:style-name="Numbering_20_Symbols" loext:num-list-format="%6%" text:bullet-char="✗">
        <style:list-level-properties text:space-before="0.7878in" text:min-label-width="0.1575in"/>
        <style:text-properties fo:font-family="StarSymbol"/>
      </text:list-level-style-bullet>
      <text:list-level-style-bullet text:level="7" text:style-name="Numbering_20_Symbols" loext:num-list-format="%7%" text:bullet-char="✗">
        <style:list-level-properties text:space-before="0.9445in" text:min-label-width="0.1575in"/>
        <style:text-properties fo:font-family="StarSymbol"/>
      </text:list-level-style-bullet>
      <text:list-level-style-bullet text:level="8" text:style-name="Numbering_20_Symbols" loext:num-list-format="%8%" text:bullet-char="✗">
        <style:list-level-properties text:space-before="1.1024in" text:min-label-width="0.1575in"/>
        <style:text-properties fo:font-family="StarSymbol"/>
      </text:list-level-style-bullet>
      <text:list-level-style-bullet text:level="9" text:style-name="Numbering_20_Symbols" loext:num-list-format="%9%" text:bullet-char="✗">
        <style:list-level-properties text:space-before="1.2598in" text:min-label-width="0.1575in"/>
        <style:text-properties fo:font-family="StarSymbol"/>
      </text:list-level-style-bullet>
      <text:list-level-style-bullet text:level="10" text:style-name="Numbering_20_Symbols" loext:num-list-format="%10%"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loext:num-list-format="%1%." style:num-suffix="." style:num-format="1">
        <style:list-level-properties text:space-before="0.25in" text:min-label-width="0.1965in"/>
      </text:list-level-style-number>
      <text:list-level-style-number text:level="2" text:style-name="Numbering_20_Symbols" loext:num-list-format="%1%.%2%." style:num-suffix="." style:num-format="1" text:display-levels="2">
        <style:list-level-properties text:space-before="0.4472in" text:min-label-width="0.1965in"/>
      </text:list-level-style-number>
      <text:list-level-style-number text:level="3" text:style-name="Numbering_20_Symbols" loext:num-list-format="%1%.%2%.%3%." style:num-suffix="." style:num-format="1" text:display-levels="3">
        <style:list-level-properties text:space-before="0.6437in" text:min-label-width="0.1965in"/>
      </text:list-level-style-number>
      <text:list-level-style-number text:level="4" text:style-name="Numbering_20_Symbols" loext:num-list-format="%1%.%2%.%3%.%4%." style:num-suffix="." style:num-format="1" text:display-levels="4">
        <style:list-level-properties text:space-before="0.8409in" text:min-label-width="0.1965in"/>
      </text:list-level-style-number>
      <text:list-level-style-number text:level="5" text:style-name="Numbering_20_Symbols" loext:num-list-format="%1%.%2%.%3%.%4%.%5%." style:num-suffix="." style:num-format="1" text:display-levels="5">
        <style:list-level-properties text:space-before="1.0374in" text:min-label-width="0.1965in"/>
      </text:list-level-style-number>
      <text:list-level-style-number text:level="6" text:style-name="Numbering_20_Symbols" loext:num-list-format="%1%.%2%.%3%.%4%.%5%.%6%." style:num-suffix="." style:num-format="1" text:display-levels="6">
        <style:list-level-properties text:space-before="1.2346in" text:min-label-width="0.1965in"/>
      </text:list-level-style-number>
      <text:list-level-style-number text:level="7" text:style-name="Numbering_20_Symbols" loext:num-list-format="%1%.%2%.%3%.%4%.%5%.%6%.%7%." style:num-suffix="." style:num-format="1" text:display-levels="7">
        <style:list-level-properties text:space-before="1.4315in" text:min-label-width="0.1965in"/>
      </text:list-level-style-number>
      <text:list-level-style-number text:level="8" text:style-name="Numbering_20_Symbols" loext:num-list-format="%1%.%2%.%3%.%4%.%5%.%6%.%7%.%8%." style:num-suffix="." style:num-format="1" text:display-levels="8">
        <style:list-level-properties text:space-before="1.6287in" text:min-label-width="0.1965in"/>
      </text:list-level-style-number>
      <text:list-level-style-number text:level="9" text:style-name="Numbering_20_Symbols" loext:num-list-format="%1%.%2%.%3%.%4%.%5%.%6%.%7%.%8%.%9%." style:num-suffix="." style:num-format="1" text:display-levels="9">
        <style:list-level-properties text:space-before="1.8252in" text:min-label-width="0.1965in"/>
      </text:list-level-style-number>
      <text:list-level-style-number text:level="10" text:style-name="Numbering_20_Symbols" loext:num-list-format="%1%.%2%.%3%.%4%.%5%.%6%.%7%.%8%.%9%.%10%."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fo:font-family="StarSymbol"/>
      </text:list-level-style-bullet>
      <text:list-level-style-bullet text:level="5" text:style-name="Numbering_20_Symbols" loext:num-list-format="%5%" text:bullet-char="•">
        <style:list-level-properties text:space-before="0.7874in" text:min-label-width="0.1555in"/>
        <style:text-properties fo:font-family="StarSymbol"/>
      </text:list-level-style-bullet>
      <text:list-level-style-bullet text:level="6" text:style-name="Numbering_20_Symbols" loext:num-list-format="%6%" text:bullet-char="•">
        <style:list-level-properties text:space-before="0.9429in" text:min-label-width="0.1555in"/>
        <style:text-properties fo:font-family="StarSymbol"/>
      </text:list-level-style-bullet>
      <text:list-level-style-bullet text:level="7" text:style-name="Numbering_20_Symbols" loext:num-list-format="%7%" text:bullet-char="•">
        <style:list-level-properties text:space-before="1.0988in" text:min-label-width="0.1555in"/>
        <style:text-properties fo:font-family="StarSymbol"/>
      </text:list-level-style-bullet>
      <text:list-level-style-bullet text:level="8" text:style-name="Numbering_20_Symbols" loext:num-list-format="%8%" text:bullet-char="•">
        <style:list-level-properties text:space-before="1.2543in" text:min-label-width="0.1555in"/>
        <style:text-properties fo:font-family="StarSymbol"/>
      </text:list-level-style-bullet>
      <text:list-level-style-bullet text:level="9" text:style-name="Numbering_20_Symbols" loext:num-list-format="%9%" text:bullet-char="•">
        <style:list-level-properties text:space-before="1.4098in" text:min-label-width="0.1555in"/>
        <style:text-properties fo:font-family="StarSymbol"/>
      </text:list-level-style-bullet>
      <text:list-level-style-bullet text:level="10" text:style-name="Numbering_20_Symbols" loext:num-list-format="%10%" text:bullet-char="•">
        <style:list-level-properties text:space-before="1.5654in" text:min-label-width="0.1555in"/>
        <style:text-properties fo:font-family="StarSymbol"/>
      </text:list-level-style-bullet>
    </text:list-style>
    <text:list-style style:name="WW8Num1">
      <text:list-level-style-number text:level="1" loext:num-list-format="%1%." style:num-suffix="." style:num-format="1">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list-level-style-number>
      <text:list-level-style-number text:level="4" loext:num-list-format="%1%.%2%.%3%.%4%" style:num-format="1" text:display-levels="4">
        <style:list-level-properties/>
      </text:list-level-style-number>
      <text:list-level-style-number text:level="5" loext:num-list-format="%1%.%2%.%3%.%4%.%5%" style:num-format="1" text:display-levels="5">
        <style:list-level-properties/>
      </text:list-level-style-number>
      <text:list-level-style-number text:level="6" loext:num-list-format="%1%.%2%.%3%.%4%.%5%.%6%" style:num-format="1" text:display-levels="6">
        <style:list-level-properties/>
      </text:list-level-style-number>
      <text:list-level-style-number text:level="7" loext:num-list-format="%1%.%2%.%3%.%4%.%5%.%6%.%7%" style:num-format="1" text:display-levels="7">
        <style:list-level-properties/>
      </text:list-level-style-number>
      <text:list-level-style-number text:level="8" loext:num-list-format="%1%.%2%.%3%.%4%.%5%.%6%.%7%.%8%" style:num-format="1" text:display-levels="8">
        <style:list-level-properties/>
      </text:list-level-style-number>
      <text:list-level-style-number text:level="9" loext:num-list-format="%1%.%2%.%3%.%4%.%5%.%6%.%7%.%8%.%9%" style:num-format="1" text:display-levels="9">
        <style:list-level-properties/>
      </text:list-level-style-number>
      <text:list-level-style-number text:level="10" loext:num-list-format="%10%." style:num-suffix="." style:num-format="1">
        <style:list-level-properties text:space-before="2.5in" text:min-label-width="0.25in"/>
      </text:list-level-style-number>
    </text:list-style>
    <text:list-style style:name="WW8Num2">
      <text:list-level-style-number text:level="1" loext:num-list-format="Appendix %1%." style:num-prefix="Appendix " style:num-suffix="." style:num-format="A" style:num-letter-sync="true">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space-before="0.2in" text:min-label-width="0.3in"/>
      </text:list-level-style-number>
      <text:list-level-style-number text:level="4" loext:num-list-format="(%4%)" style:num-prefix="(" style:num-suffix=")" style:num-format="i">
        <style:list-level-properties text:min-label-width="0.6in" text:min-label-distance="0.1in" fo:text-align="end"/>
      </text:list-level-style-number>
      <text:list-level-style-number text:level="5" loext:num-list-format="%5%)" style:num-suffix=")" style:num-format="1">
        <style:list-level-properties text:space-before="0.4in" text:min-label-width="0.3in"/>
      </text:list-level-style-number>
      <text:list-level-style-number text:level="6" loext:num-list-format="%6%)" style:num-suffix=")" style:num-format="a" style:num-letter-sync="true">
        <style:list-level-properties text:space-before="0.5in" text:min-label-width="0.3in"/>
      </text:list-level-style-number>
      <text:list-level-style-number text:level="7" loext:num-list-format="%7%)" style:num-suffix=")" style:num-format="i">
        <style:list-level-properties text:min-label-width="0.9in" text:min-label-distance="0.2in" fo:text-align="end"/>
      </text:list-level-style-number>
      <text:list-level-style-number text:level="8" loext:num-list-format="%8%." style:num-suffix="." style:num-format="a" style:num-letter-sync="true">
        <style:list-level-properties text:space-before="0.7in" text:min-label-width="0.3in"/>
      </text:list-level-style-number>
      <text:list-level-style-number text:level="9" loext:num-list-format="%9%." style:num-suffix="." style:num-format="i">
        <style:list-level-properties text:min-label-width="1.1in" text:min-label-distance="0.1in" fo:text-align="end"/>
      </text:list-level-style-number>
      <text:list-level-style-number text:level="10" loext:num-list-format="%10%." style:num-suffix="." style:num-format="1">
        <style:list-level-properties text:space-before="2.5in" text:min-label-width="0.25in"/>
      </text:list-level-style-number>
    </text:list-style>
    <text:list-style style:name="WW8Num3" text:consecutive-numbering="true">
      <text:list-level-style-bullet text:level="1" text:style-name="WW8Num3z0" loext:num-list-format="%1%" text:bullet-char="">
        <style:list-level-properties text:min-label-width="0.25in"/>
        <style:text-properties style:font-name="Symbol"/>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WW8Num4">
      <text:list-level-style-number text:level="1" loext:num-list-format="%1%" style:num-format="1">
        <style:list-level-properties text:min-label-width="0.3in"/>
      </text:list-level-style-number>
      <text:list-level-style-number text:level="2" loext:num-list-format="%1%.%2%" style:num-format="1" text:display-levels="2">
        <style:list-level-properties text:min-label-width="0.4in"/>
      </text:list-level-style-number>
      <text:list-level-style-number text:level="3" loext:num-list-format="%1%.%2%.%3%" style:num-format="1" text:display-levels="3">
        <style:list-level-properties text:min-label-width="0.5in"/>
      </text:list-level-style-number>
      <text:list-level-style-number text:level="4" loext:num-list-format="%1%.%2%.%3%.%4%" style:num-format="1" text:display-levels="4">
        <style:list-level-properties text:min-label-width="0.6in"/>
      </text:list-level-style-number>
      <text:list-level-style-number text:level="5" loext:num-list-format="%1%.%2%.%3%.%4%.%5%" style:num-format="1" text:display-levels="5">
        <style:list-level-properties text:min-label-width="0.7in"/>
      </text:list-level-style-number>
      <text:list-level-style-number text:level="6" loext:num-list-format="%6%" style:num-format="1">
        <style:list-level-properties text:min-label-width="0.8in"/>
      </text:list-level-style-number>
      <text:list-level-style-number text:level="7" loext:num-list-format="%7%" style:num-format="1">
        <style:list-level-properties text:min-label-width="0.6in"/>
      </text:list-level-style-number>
      <text:list-level-style-number text:level="8" loext:num-list-format="%7%.%8%" style:num-format="1" text:display-levels="2">
        <style:list-level-properties text:min-label-width="0.6in"/>
      </text:list-level-style-number>
      <text:list-level-style-number text:level="9" loext:num-list-format="%7%.%8%.%9%" style:num-format="1" text:display-levels="3">
        <style:list-level-properties text:min-label-width="0.6in"/>
      </text:list-level-style-number>
      <text:list-level-style-number text:level="10" loext:num-list-format="%10%." style:num-suffix="." style:num-format="1">
        <style:list-level-properties text:space-before="2.5in" text:min-label-width="0.25in"/>
      </text:list-level-style-number>
    </text:list-style>
    <text:list-style style:name="WW8Num5">
      <text:list-level-style-number text:level="1" loext:num-list-format="%1%." style:num-suffix="." style:num-format="A" style:num-letter-sync="true">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list-level-style-number>
      <text:list-level-style-number text:level="4" loext:num-list-format="%1%.%2%.%3%.%4%" style:num-format="1" text:display-levels="4">
        <style:list-level-properties/>
      </text:list-level-style-number>
      <text:list-level-style-number text:level="5" loext:num-list-format="%1%.%2%.%3%.%4%.%5%" style:num-format="1" text:display-levels="5">
        <style:list-level-properties/>
      </text:list-level-style-number>
      <text:list-level-style-number text:level="6" loext:num-list-format="%1%.%2%.%3%.%4%.%5%.%6%" style:num-format="1" text:display-levels="6">
        <style:list-level-properties/>
      </text:list-level-style-number>
      <text:list-level-style-number text:level="7" loext:num-list-format="%1%.%2%.%3%.%4%.%5%.%6%.%7%" style:num-format="1" text:display-levels="7">
        <style:list-level-properties/>
      </text:list-level-style-number>
      <text:list-level-style-number text:level="8" loext:num-list-format="%1%.%2%.%3%.%4%.%5%.%6%.%7%.%8%" style:num-format="1" text:display-levels="8">
        <style:list-level-properties/>
      </text:list-level-style-number>
      <text:list-level-style-number text:level="9" loext:num-list-format="%1%.%2%.%3%.%4%.%5%.%6%.%7%.%8%.%9%" style:num-format="1" text:display-levels="9">
        <style:list-level-properties/>
      </text:list-level-style-number>
      <text:list-level-style-number text:level="10" loext:num-list-format="%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9">
      <number:year number:style="long"/>
    </number:date-style>
    <number:date-style style:name="N120">
      <number:day number:style="long"/>
      <number:text> </number:text>
      <number:month number:style="long" number:textual="true"/>
      <number:text> </number:text>
      <number:year number:style="long"/>
    </number:date-style>
    <number:date-style style:name="N10119" number:language="en" number:country="GB">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master-page-name="">
      <style:paragraph-properties style:page-number="auto">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
      </style:footer>
    </style:master-page>
    <style:master-page style:name="Convert_20_1" style:display-name="Convert 1" style:page-layout-name="Mpm2" draw:style-name="Mdp1">
      <style:footer>
        <text:p text:style-name="MP2"><text:page-number text:select-page="current">ii</text:page-number></text:p>
      </style:footer>
    </style:master-page>
    <style:master-page style:name="Convert_20_2" style:display-name="Convert 2" style:page-layout-name="Mpm3" draw:style-name="Mdp1">
      <style:header>
        <text:p text:style-name="MP3"><text:s/></text:p>
      </style:header>
      <style:footer>
        <text:p text:style-name="MP2"><text:page-number text:select-page="current">0</text:page-number></text:p>
      </style:footer>
    </style:master-page>
    <style:master-page style:name="Convert_20_3" style:display-name="Convert 3" style:page-layout-name="Mpm4" draw:style-name="Mdp1">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120">19 May 2026</text:modification-date></text:p>
              <text:p text:style-name="MP5"/>
            </table:table-cell>
            <table:table-cell table:style-name="Table3.A1" office:value-type="string">
              <text:p text:style-name="MP6"><text:title>Pascal API 4 OpenSSL</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draw:style-name="Mdp1" style:next-style-name="Left_20_Page">
      <style:header>
        <text:p text:style-name="MP9"><text:tab/><text:tab/><text:span text:style-name="MT1"><text:chapter text:display="name" text:outline-level="1"> Notes on the OpenSSLh2pas.sh Script</text:chapter></text:span></text:p>
      </style:header>
      <style:footer>
        <text:p text:style-name="MP10"><text:page-number text:select-page="current">25</text:page-number></text:p>
      </style:footer>
    </style:master-page>
    <style:master-page style:name="Left_20_Page" style:display-name="Left Page" style:page-layout-name="Mpm6" draw:style-name="Mdp1" style:next-style-name="Right_20_Page">
      <style:header>
        <text:p text:style-name="MP11"><text:title>Pascal API 4 OpenSSL</text:title></text:p>
      </style:header>
      <style:footer>
        <text:p text:style-name="MP12"><text:page-number text:select-page="current">26</text:page-number></text:p>
      </style:footer>
    </style:master-page>
    <style:master-page style:name="Front_20_Right" style:display-name="Front Right" style:page-layout-name="Mpm7" draw:style-name="Mdp2" style:next-style-name="Front_20_Left">
      <style:footer>
        <text:p text:style-name="MP13"><text:page-number text:select-page="current">iii</text:page-number></text:p>
      </style:footer>
    </style:master-page>
    <style:master-page style:name="Front_20_Left" style:display-name="Front Left" style:page-layout-name="Mpm8" draw:style-name="Mdp1" style:next-style-name="Front_20_Right">
      <style:footer>
        <text:p text:style-name="Footer"><text:page-number text:select-page="current">iv</text:page-number></text:p>
      </style:footer>
    </style:master-page>
    <style:master-page style:name="Appendix_20_Right" style:display-name="Appendix Right" style:page-layout-name="Mpm9" draw:style-name="Mdp1"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draw:style-name="Mdp2" style:next-style-name="Appendix_20_Right">
      <style:header>
        <text:p text:style-name="Header"><text:title>Pascal API 4 OpenSSL</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Pascal API 4 OpenSSL</dc:title>
    <meta:creation-date>2024-11-29T14:49:33.450548890</meta:creation-date>
    <meta:editing-cycles>97</meta:editing-cycles>
    <meta:editing-duration>PT10H53M</meta:editing-duration>
    <dc:date>2026-05-19T15:17:03.055375644</dc:date>
    <meta:print-date>2026-05-19T13:41:45.619172191</meta:print-date>
    <meta:printed-by>PDF files</meta:printed-by>
    <meta:document-statistic meta:table-count="4" meta:image-count="0" meta:object-count="1" meta:page-count="29" meta:paragraph-count="687" meta:word-count="5937" meta:character-count="50194" meta:non-whitespace-character-count="44439"/>
    <meta:user-defined meta:name="Company">MWA Software</meta:user-defined>
    <meta:user-defined meta:name="Info 1"/>
    <meta:user-defined meta:name="Info 2"/>
    <meta:user-defined meta:name="Info 3"/>
    <meta:user-defined meta:name="Info 4" meta:value-type="string"/>
    <meta:user-defined meta:name="IssueNo" meta:value-type="string">Issue 2.0</meta:user-defined>
    <meta:user-defined meta:name="Reference" meta:value-type="string">MWA/OpenSSLCodeGen</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